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uerpo_20_de_20_texto.dialogue">
      <style:paragraph-properties fo:margin-top="0cm" fo:margin-bottom="0.529cm" style:contextual-spacing="false"/>
    </style:style>
    <style:style style:name="P2" style:family="paragraph" style:parent-style-name="Cuerpo_20_de_20_texto.prophecy">
      <style:paragraph-properties fo:margin-top="0cm" fo:margin-bottom="0.529cm" style:contextual-spacing="false" fo:text-indent="0cm" style:auto-text-indent="false"/>
    </style:style>
    <style:style style:name="P3" style:family="paragraph" style:parent-style-name="Cuerpo_20_de_20_texto.prophecy">
      <style:paragraph-properties fo:margin-top="0cm" fo:margin-bottom="0.529cm" style:contextual-spacing="false"/>
    </style:style>
    <style:style style:name="P4" style:family="paragraph" style:parent-style-name="Heading_20_1">
      <style:paragraph-properties fo:text-align="center" style:justify-single-word="false" fo:orphans="100"/>
    </style:style>
    <style:style style:name="P5" style:family="paragraph" style:parent-style-name="Heading_20_1">
      <style:paragraph-properties fo:margin-left="0.794cm" fo:margin-right="0.794cm" fo:margin-top="0.794cm" fo:margin-bottom="0.794cm" style:contextual-spacing="false" fo:text-align="center" style:justify-single-word="false" fo:orphans="50" fo:text-indent="0cm" style:auto-text-indent="false"/>
    </style:style>
    <style:style style:name="P6" style:family="paragraph" style:parent-style-name="Heading_20_1">
      <style:paragraph-properties fo:margin-left="0.794cm" fo:margin-right="0.794cm" fo:margin-top="0.794cm" fo:margin-bottom="0.794cm" style:contextual-spacing="false" fo:text-align="center" style:justify-single-word="false" fo:orphans="50" fo:text-indent="0cm" style:auto-text-indent="false"/>
      <style:text-properties loext:border-line-width="0.026cm 0.026cm 0.026cm" loext:padding="0.794cm" loext:border="2.24pt double #ffd700"/>
    </style:style>
    <style:style style:name="P7" style:family="paragraph" style:parent-style-name="Heading_20_2">
      <style:paragraph-properties fo:text-align="center" style:justify-single-word="false" fo:orphans="100"/>
    </style:style>
    <style:style style:name="P8" style:family="paragraph" style:parent-style-name="Heading_20_2">
      <style:paragraph-properties fo:margin-left="0.794cm" fo:margin-right="0.794cm" fo:margin-top="0.794cm" fo:margin-bottom="0.529cm" style:contextual-spacing="false" fo:text-align="center" style:justify-single-word="false" fo:text-indent="0cm" style:auto-text-indent="false"/>
    </style:style>
    <style:style style:name="P9" style:family="paragraph" style:parent-style-name="Heading_20_2">
      <style:paragraph-properties fo:margin-left="0.794cm" fo:margin-right="0.794cm" fo:margin-top="0.794cm" fo:margin-bottom="0.794cm" style:contextual-spacing="false" fo:text-align="center" style:justify-single-word="false" fo:orphans="50" fo:text-indent="0cm" style:auto-text-indent="false"/>
    </style:style>
    <style:style style:name="P10" style:family="paragraph" style:parent-style-name="Heading_20_2">
      <style:paragraph-properties fo:margin-left="0.794cm" fo:margin-right="0.794cm" fo:margin-top="0.794cm" fo:margin-bottom="0.794cm" style:contextual-spacing="false" fo:text-align="center" style:justify-single-word="false" fo:orphans="50" fo:text-indent="0cm" style:auto-text-indent="false"/>
      <style:text-properties loext:border-line-width="0.026cm 0.026cm 0.026cm" loext:padding="0.794cm" loext:border="2.24pt double #ffd700"/>
    </style:style>
    <style:style style:name="P11" style:family="paragraph" style:parent-style-name="Heading_20_2">
      <style:paragraph-properties fo:margin-left="0.794cm" fo:margin-right="0.794cm" fo:margin-top="0.794cm" fo:margin-bottom="0.529cm" style:contextual-spacing="false" fo:text-align="center" style:justify-single-word="false" fo:text-indent="0cm" style:auto-text-indent="false"/>
      <style:text-properties loext:padding-left="0cm" loext:padding-right="0cm" loext:padding-top="0cm" loext:padding-bottom="0.265cm" loext:border-left="none" loext:border-right="none" loext:border-top="none" loext:border-bottom="1.5pt solid #ffd700"/>
    </style:style>
    <style:style style:name="P12" style:family="paragraph" style:parent-style-name="Heading_20_3">
      <style:paragraph-properties fo:text-align="center" style:justify-single-word="false" fo:orphans="100"/>
    </style:style>
    <style:style style:name="P13" style:family="paragraph" style:parent-style-name="Text_20_body">
      <style:paragraph-properties fo:margin-top="0cm" fo:margin-bottom="0.529cm" style:contextual-spacing="false" fo:text-indent="0cm" style:auto-text-indent="false"/>
    </style:style>
    <style:style style:name="P14" style:family="paragraph" style:parent-style-name="Text_20_body">
      <style:paragraph-properties fo:margin-left="0.212cm" fo:margin-right="0.212cm" fo:margin-top="0.212cm" fo:margin-bottom="0.212cm" style:contextual-spacing="false" fo:text-indent="0cm" style:auto-text-indent="false"/>
    </style:style>
    <style:style style:name="P15" style:family="paragraph" style:parent-style-name="Text_20_body" style:master-page-name="HTML">
      <style:paragraph-properties fo:margin-left="0.529cm" fo:margin-right="0.529cm" fo:margin-top="0.529cm" fo:margin-bottom="0.529cm" style:contextual-spacing="false" fo:text-align="center" style:justify-single-word="false" fo:orphans="100" fo:text-indent="0cm" style:auto-text-indent="false" style:page-number="auto"/>
      <style:text-properties fo:letter-spacing="0.318cm"/>
    </style:style>
    <style:style style:name="P16" style:family="paragraph" style:parent-style-name="Text_20_body">
      <style:paragraph-properties fo:margin-left="0.529cm" fo:margin-right="0.529cm" fo:margin-top="0.529cm" fo:margin-bottom="0.529cm" style:contextual-spacing="false" fo:text-align="center" style:justify-single-word="false" fo:orphans="100" fo:text-indent="0cm" style:auto-text-indent="false"/>
      <style:text-properties fo:letter-spacing="0.318cm"/>
    </style:style>
    <style:style style:name="P17" style:family="paragraph" style:parent-style-name="Text_20_body">
      <style:paragraph-properties fo:text-align="center" style:justify-single-word="false" fo:orphans="100"/>
    </style:style>
    <style:style style:name="P18" style:family="paragraph" style:parent-style-name="Text_20_body">
      <style:paragraph-properties fo:margin-left="0.529cm" fo:margin-right="0.529cm" fo:margin-top="0.529cm" fo:margin-bottom="0.529cm" style:contextual-spacing="false" fo:text-align="center" style:justify-single-word="false" fo:text-indent="0cm" style:auto-text-indent="false"/>
    </style:style>
    <style:style style:name="P19" style:family="paragraph" style:parent-style-name="Text_20_body">
      <style:paragraph-properties fo:margin-left="0.794cm" fo:margin-right="0.794cm" fo:margin-top="0.794cm" fo:margin-bottom="0.529cm" style:contextual-spacing="false" fo:text-align="center" style:justify-single-word="false" fo:text-indent="0cm" style:auto-text-indent="false"/>
    </style:style>
    <style:style style:name="P20" style:family="paragraph" style:parent-style-name="Text_20_body">
      <style:paragraph-properties fo:margin-left="0.794cm" fo:margin-right="0.794cm" fo:margin-top="0.794cm" fo:margin-bottom="0.529cm" style:contextual-spacing="false" fo:text-align="center" style:justify-single-word="false" fo:text-indent="0cm" style:auto-text-indent="false"/>
      <style:text-properties loext:padding-left="0cm" loext:padding-right="0cm" loext:padding-top="0cm" loext:padding-bottom="0.265cm" loext:border-left="none" loext:border-right="none" loext:border-top="none" loext:border-bottom="1.5pt solid #ffd700"/>
    </style:style>
    <style:style style:name="P21" style:family="paragraph" style:parent-style-name="Text_20_body">
      <style:paragraph-properties fo:margin-top="0cm" fo:margin-bottom="0.529cm" style:contextual-spacing="false"/>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paragraph-properties fo:margin-left="0.212cm" fo:margin-right="0.212cm" fo:margin-top="0.212cm" fo:margin-bottom="0.212cm" style:contextual-spacing="false" fo:text-indent="0cm" style:auto-text-indent="false"/>
      <style:text-properties fo:font-style="italic" loext:padding-left="0.049cm" loext:padding-right="0cm" loext:padding-top="0cm" loext:padding-bottom="0cm" loext:border-left="2.24pt solid #ffd700" loext:border-right="none" loext:border-top="none" loext:border-bottom="none"/>
    </style:style>
    <style:style style:name="P31" style:family="paragraph" style:parent-style-name="Text_20_body" style:list-style-name="L5"/>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6"/>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T1" style:family="text">
      <style:text-properties fo:font-style="italic" loext:padding-left="0.049cm" loext:padding-right="0cm" loext:padding-top="0cm" loext:padding-bottom="0cm" loext:border-left="2.24pt solid #ffd700" loext:border-right="none" loext:border-top="none" loext:border-bottom="none"/>
    </style:style>
    <style:style style:name="T2" style:family="text">
      <style:text-properties loext:padding-left="0.049cm" loext:padding-right="0cm" loext:padding-top="0cm" loext:padding-bottom="0cm" loext:border-left="2.24pt solid #ffd700" loext:border-right="none" loext:border-top="none" loext:border-bottom="none"/>
    </style:style>
    <style:style style:name="T3" style:family="text">
      <style:text-properties loext:padding-left="0cm" loext:padding-right="0cm" loext:padding-top="0cm" loext:padding-bottom="0.265cm" loext:border-left="none" loext:border-right="none" loext:border-top="none" loext:border-bottom="1.5pt solid #ffd700"/>
    </style:style>
    <style:style style:name="T4" style:family="text">
      <style:text-properties loext:border-line-width="0.026cm 0.026cm 0.026cm" loext:padding="0.794cm" loext:border="2.24pt double #ffd7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P4">EL LOST CANVAS</text:p>
      <text:h text:style-name="P7" text:outline-level="2">Cronicas de Xiān y Aelinor</text:h>
      <text:h text:style-name="P12" text:outline-level="3">Edicion Completa — Tomos I, II y III</text:h>
      <text:p text:style-name="P16">✦✦✦</text:p>
      <text:p text:style-name="P17">«La pintura no es solo tinta sobre tela. Es vida, es alma, es sacrificio»</text:p>
      <text:p text:style-name="P6">VOLUMEN I</text:p>
      <text:h text:style-name="P10" text:outline-level="2">El Despertar del Pincel Maldito</text:h>
      <text:p text:style-name="P16">✦✦✦</text:p>
      <text:p text:style-name="P4">VOLUMEN I</text:p>
      <text:h text:style-name="P7" text:outline-level="2">El Despertar del Pincel Maldito</text:h>
      <text:h text:style-name="P12" text:outline-level="3">Crónicas de Xiān y Aelinor</text:h>
      <text:p text:style-name="P16">✦✦✦</text:p>
      <text:p text:style-name="P17">«La pintura no es solo tinta sobre tela. Es vida, es alma, es sacrificio»</text:p>
      <text:p text:style-name="P6">EL LOST CANVAS</text:p>
      <text:h text:style-name="P10" text:outline-level="2">Crónicas de Xiān y Aelinor</text:h>
      <text:p text:style-name="P20">Capítulo I </text:p>
      <text:h text:style-name="P11" text:outline-level="2">El Pintor del Pueblo Perdido</text:h>
      <text:p text:style-name="P13">Cuando el pincel traicione la carne<text:line-break/>y la tinta beba la vida<text:line-break/>el Canvas Perdido despertará<text:line-break/>y la Sombra conocerá el mied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pueblo de Senda descansaba en el valle como un animal dormido entre las rodillas de las montañas del norte. Era un lugar donde el tiempo se medía por las estaciones y el trabajo de las campesinas, donde los caminos de tierra señalaban el paso de comerciantes de paso y donde el silencio era tan espeso que podía cortarse con un cuchillo. Allí, en una cabaña de madera que olía a lino y aguarrás, vivía un joven llamado Xiān.</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tenía dieciséis años y manos manchadas de por vida. Su padre, el antiguo pintor del valle, había desaparecido cuando él apenas tenía memoria. Solo quedaban dos cosas de él: un pincel antiguo con el mango de hueso gastado por generaciones, y una carta desgarrada que reza: «Pinta lo que sientes, no lo que ves. El Canvas Perdido es una maldición».</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Por las mañanas, Xiān trabajaba la huerta de la viuda Tanaka. Por las tardes, pintaba. Sus cuadros eran modestos: retratos de ancianos, paisajes de las montañas, imágenes de santos para la capilla. Le pagaban con arroz o moneda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Pero lo que realmente pintaba de noche era lo que ningún pueblo podía comprar. Porque Xiān pintaba imágenes que se movían. No era un secreto — no del todo. La vieja curandera del pueblo, la ñake Hana, lo había visto de niño.</text:p>
      <text:p text:style-name="P21">Una tarde, Xiān había pintado un pájaro posado en la ventana. El pájaro abrió el pico. El pájaro cantó. Y entonces Xiān cayó al suelo con fiebre durante tres días.</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1">La vieja Hana: <text:span text:style-name="Emphasis">Tu sangre es tu lienzo, niño. Cada pintura que das vida te arranca un día de vida. No pintes más.</text:span></text:p>
      <text:p text:style-name="P21">Pero Xiān no podía evitarlo. La necesidad de pintar lo llamaba como el agua llama a la sed. Cada noche, cuando el pueblo dormía, Xiān se sentaba frente a su caballete y dejaba que sus manos se movieran solas. Las pinturas que creaba de noche eran diferentes. Eran sueños. Pesadillas. Deseos. Pintaba mujeres con alas de fuego. Guerreros con espadas de luz. Dragones que surcaban cielos de tinta. Y cada mañana, cuando el sol se levantaba, las pinturas habían desaparecido. Solo quedaban manchas en el lienzo y un sabor amargo en la boca.</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Esa mañana, el pueblo despertó con noticias: había visto en el camino del norte una noble rodeada de guardias. Las mujeres susurraban que venían de la capital. Los hombres cerraban las ventanas. Xiān no escuchaba. Estaba en el puente de piedra, pintando el río. Pero sus ojos se alzaron hasta el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ra alta. El vestido era carmesí, como la sangre de un cuadro viejo. El pelo, oscuro como tinta china. Cuando sus miradas se cruzaron en el puente, Xiān sintió que su pincel temblaba.</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La desconocida: <text:span text:style-name="Emphasis">Tú eres el pintor. He oído tu nombre en la senda: Xiān, el hijo del Pintor Perdido. El Perdido quiere verte.</text:span></text:p>
      <text:p text:style-name="P1">Xiān: <text:span text:style-name="Emphasis">No sé quién eres, pero estás en mi senda.</text:span></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Ella sonrió una sonrisa triste. Me llamo Aelinor, dijo. Y vamos hacia el mismo lugar, Xiān. Hacia el Perdido. Hacia el final de todo. Xiān la miró. Y por primera vez en su vida, sintió que alguien lo veía de verdad.</text:p>
      <text:p text:style-name="P20">Capítulo II </text:p>
      <text:h text:style-name="P11" text:outline-level="2">La Primera Pintura Despierta</text:h>
      <text:p text:style-name="P13">El lienzo bebe la luz del pintor<text:line-break/>y devuelve oscuridad.<text:line-break/>Cada trazo es un latido robado.<text:line-break/>Cada color menos.</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sa noche, Xiān no pudo dormir. Las palabras de la muchacha danzaban en su mente como moscas alrededor de una herida. «El Perdido quiere verte». Significaba que habían descubierto su don. Y cuando los nobles descubrían un don, lo reclamaban... o lo destruían.</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Se sentó frente a su caballete. El pincel de hueso parecía pesado. Tomó una brocha fina, empapó en tinta negra y comenzó a dibujar. No había luz natural — era medianoche. Pero la tinta brillaba por sí mism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text:soft-page-break/>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Dibujó una figura. Un guerrero de pie sobre un acantilado, con una espada de luz y una capa de tormentas. Cada trazo brotó como si la mano no le perteneciera. Y mientras pintaba, Xiān sintió cómo algo se alejaba de él. No dolor, pero sí: un desgarro, como si un hilo de su pecho se deshicera con cada pincelada.</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El corazón le latía con fuerza. Las manos le temblaban. Pero no podía detenerse. La pintura lo llamaba, lo exigía, lo consumía. Cuando terminó, el guerrero abrió los ojos.</text:p>
      <text:p text:style-name="P1">El guerrero de tinta: <text:span text:style-name="Emphasis">Pintor... ¿Por qué me has creado, tú que apenas tienes vida para ti?</text:sp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La figura dio un paso. Xiān se alejó. Tropezó con el cubo de aguarrás y cayó de espaldas. Y entonces algo explotó en su pecho: un llanto seco, un dolor que le robó el aliento. Tosió. En el suelo había manchas rojas.</text:p>
      <text:p text:style-name="P1">Xiān: <text:span text:style-name="Emphasis">¿Qué eres? ¿Qué me has hecho?</text:span></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El guerrero: <text:span text:style-name="Emphasis">Soy tu primera obra, pintor. Tu maldición y tu destino soy yo. Y cada vez que me crees, morirás un poc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La muchacha de carmesí, Aelinor, entró en la cabaña. Se quedó quieta al ver al guerrero, dibujado en el aire. Eres un Lost Canvas, dijo. Un pintor del Canvas Perdid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sintió el pincel ardiendo en la mano, mientras el guerrero de tinta se deshacía lentamente, volviendo a ser tinta, luego humo, luego nada. Y con él, algo de Xiān.</text:p>
      <text:p text:style-name="P1">Aelinor: <text:span text:style-name="Emphasis">Tu padre murió de la misma forma. Tienes que venir conmigo.</text:span></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1">Xiān: <text:span text:style-name="Emphasis">¿Puedes enseñarme a controlar esto?</text:span></text:p>
      <text:p text:style-name="P1">Aelinor: <text:span text:style-name="Emphasis">Puedo enseñarte a sobrevivir. Pero el Perdido sabe que existes. Viene hacia ti. Y cuando llegue, habrás pintado tu último cuadro.</text:spa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0">Capítulo III </text:p>
      <text:h text:style-name="P11" text:outline-level="2">La Chica de la Capa Carmesí</text:h>
      <text:p text:style-name="P13">La nobleza viste seda y terciopelo.<text:line-break/>Pero bajo la capa carmesí<text:line-break/>hay cicatrices de tinta<text:line-break/>y un alma que pintó su propia muerte.</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Aelinor de... Xiān no conocía su apellido. La muchacha caminaba delante de él por el sendero del bosque, y cada tanto se detenía a mirarlo como si esperara que él desapareciera.</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voy a huir. No sé adónde ir.</text:span></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Todo el mundo hude de la Sombra. Primera vez que veo a alguien que no lo hace.</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e visto la Sombra.</text:span></text:p>
      <text:p text:style-name="P1">Aelinor: <text:span text:style-name="Emphasis">Entonces has sido afortunado. O maldito. Aún no sé cuál.</text:sp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La senda se abría entre robles. El sol filtraba rayos dorados, y Xiān podría creer que estaba paseando si no fuera por las cicatrices de Aelinor. Las llevaba en las muñecas: finas, como cortes de pincel, dibujando patrones que no eran naturales. Eran marcas de Lost Canvas.</text:p>
      <text:p text:style-name="P1">Xiān: <text:span text:style-name="Emphasis">Tú también pintas el Lost Canvas.</text:span></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La muchacha se detuvo. Volteó a verlo con los ojos entrecerrados. ¿Cómo lo sabe? Las cicatrices, dijo Xiān. Son como las mías. Extendió las palmas, donde líneas rojas formaban un mapa de trazos todavía frescos.</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Aelinor: <text:span text:style-name="Emphasis">Sí. Soy pintora. Pero no perdí a mi padre pintando. Lo perdí a manos del Perdido. Por eso nací pintando: para destruirl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Por primera vez, Xiān sintió que alguien entendía la llama en su pecho. La misma rabia, la misma pasión suicida por pintar aunque costara la vida. Juntos podemos, empezó Xiān. No, interrumpió Aelinor. Tú eres el perdido, Xiān. El último. El que importa. Yo soy solo la espada que te guía.</text:p>
      <text:p text:style-name="P21">La noche cayó sobre el bosque. Aelinor encendió una hoguera con un trozo de borrilán y una brocha. La pintura era simple: un círculo de llamas que rotaban.</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1">Xiān: <text:span text:style-name="Emphasis">Eso... eso es hermoso.</text:span></text:p>
      <text:p text:style-name="P1">Aelinor: <text:span text:style-name="Emphasis">Sí. Y me costó un mes de vida. El precio es justo.</text:spa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Xiān: <text:span text:style-name="Emphasis">¿Un m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Aelinor: <text:span text:style-name="Emphasis">Algo así. El Lost Canvas consume. Cuanto más poderoso, más vida bebe. Pero tú... tu don es único, Xiān. Hijo del Pintor Supremo.</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1">Xiān: <text:span text:style-name="Emphasis">Mi padre era solo un pintor de aldea.</text:span></text:p>
      <text:p text:style-name="P1">Aelinor: <text:span text:style-name="Emphasis">Tu padre era Xi Dianxing, el último Pintor Supremo, el que encerró a la Sombra en el Abismo de las Tinieblas.</text:spa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El mundo se detuvo. Mientes, dijo Xiān. Se levantó y caminó hacia el fuego, pero Aelinor lo detuvo con un gesto. No miento. Duerme. Mañana comenzaremos tu entrenamiento.</text:p>
      <text:p text:style-name="P21">Xiān se quedó en silencio. Y por primera vez desde que tenía memoria, sintió que el pincel de hueso en su mano quizás significaba algo.</text:p>
      <text:p text:style-name="P21"><text:soft-page-break/>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0">Capítulo IV </text:p>
      <text:h text:style-name="P11" text:outline-level="2">El Camino a la Capital</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Xiān despertó antes del amanecer. El bosque estaba cubierto de niebla, y los pájaros aún no cantaban. Se sentó junto a la hoguera apagada y miró el pincel de hueso. La luz del amanecer lo hacía brillar, como si el propio hueso estuviera vivo. Pensó en su padre. En las historias que la vieja Hana le contaba cuando era niño. En el hombre que había salvado al mundo y había muerto en el intento. Pero también había historias más oscuras: historias de un hombre que había perdido la cordura, que había pintado cosas que no deberían existir.</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V </text:p>
      <text:h text:style-name="P11" text:outline-level="2">El Palacio de Papier</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camino que seguían serpenteaba entre acantilados y bosques densos. A veces, Xiān veía figuras en las sombras. No eran Espectros. Eran algo diferente. Algo más antiguo. Aelinor los llamaba 'los que se fueron'. Pintores que habían perdido su poder y ahora vagaban entre el mundo real y el mundo del Canvas. Xiān quería hablar con ellos, pero Aelinor lo detuvo. No hables con ellos, dijo. Porque te responderán. Y sus respuestas te volverán loc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text:soft-page-break/>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VI </text:p>
      <text:h text:style-name="P11" text:outline-level="2">El Pincel Ancestral</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text:soft-page-break/>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VII </text:p>
      <text:h text:style-name="P11" text:outline-level="2">La Sombra Acecha</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Souma los recibió en la puerta del Palacio. Su armadura de Libra brillaba bajo el sol. Bienvenidos, dijo. Xiān, hijo de Dianxing. Sabía que vendrías. El Palacio de Papier se extendía ante ellos: setenta y siete escalones, torres de mármol blanco, frescos que representaban batallas contra la Sombra. Cada escalón tenía grabado el nombre de un pintor famos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VIII </text:p>
      <text:h text:style-name="P11" text:outline-level="2"><text:soft-page-break/>El Retrato de la Madre</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IX </text:p>
      <text:h text:style-name="P11" text:outline-level="2">La Primera Gran Batalla</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Espectro era diferente a los demás. Era más fuerte, más inteligente. Y cuando Xiān lo derrotó, el Espectro sonrió. La Sombra te quiere vivo, dijo. Quiere que pintes. Quiere que te conviertas en la llave. Y se desvaneció antes de que Xiān pudiera preguntar qué significaba.</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text:soft-page-break/>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X </text:p>
      <text:h text:style-name="P11" text:outline-level="2">El Sacrificio del Padre</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Xiān pintó a su madre. No como era, sino como la recordaba: joven, sonriendo, con los ojos cerrados. La pintura cobró vida. Y por un momento, Xiān sintió que su madre estaba ahí, de verdad, abrazándolo. Pero entonces la pintura se deshizo. Y Xiān lloró. Porque sabía que nunca volvería a verla.</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text:soft-page-break/>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XI </text:p>
      <text:h text:style-name="P11" text:outline-level="2">El Pincel con Intención</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La primera gran batalla fue caótica. Tres Espectros atacaron simultáneamente. Souma enfrentó a uno. Aelinor a otro. Y Xiān al tercero. Pero Xiān no era suficiente fuerte. Estaba a punto de morir cuando Aelinor intervino. Su corazón de tinta latió con una fuerza que hizo temblar el Palacio. Y juntos, derrotaron a los Espectro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XII </text:p>
      <text:h text:style-name="P11" text:outline-level="2">El Espectro del Umbral</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text:soft-page-break/>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Souma le reveló la verdad sobre su padre. Xi Dianxing no había muerto pintando. Había muerto sellando. Usó todo su ser para crear el Sello del Abismo. Y ahora, el sello se debilitaba. Y solo Xiān podía reforzarlo. O romperl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XIII </text:p>
      <text:h text:style-name="P11" text:outline-level="2">El Error del Pintor</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entrenamiento con Aelinor fue diferente. Aelinor no enseñaba técnica. Enseñaba sentimiento. Pinta lo que sientes, no lo que ves. Y Xiān pintó. Pintó el miedo, la rabia, la tristeza, el amor. Y cada pintura era más poderosa que la anterior.</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text:soft-page-break/>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XIV </text:p>
      <text:h text:style-name="P11" text:outline-level="2">El Secreto de Aelinor</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Espectro del Umbral era el más fuerte que Xiān había enfrentado. Y cuando Xiān estaba a punto de morir, Aelinor apareció. Su capa carmesí se transformó en alas de luz. Y con un solo trazo, encerró al Espectro en una jaula de tinta dorada. Pero el precio fue alto. Aelinor cayó de rodillas, tosiendo sangr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text:soft-page-break/>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20">Capítulo XV </text:p>
      <text:h text:style-name="P11" text:outline-level="2">El Teniente de la Sombra</text:h>
      <text:p text:style-name="P13">El camino del pintor está lleno de sombras.<text:line-break/>Cada paso es una elección.<text:line-break/>Cada elección tiene un preci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Xiān miró el horizonte. Las montañas se alzaban ante ellos como muros naturales, imponentes y antiguos. El camino serpenteaba entre ellas como una serpiente de tierra, desapareciendo en la distancia brumosa. El aire olía a lluvia y a tinta seca.</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1">Aelinor: <text:span text:style-name="Emphasis">El camino será largo. Y peligroso. ¿Estás seguro de que quieres seguir?</text:spa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Xiān: <text:span text:style-name="Emphasis">No hay vuelta atrás. Nunca la hubo.</text:span></text:p>
      <text:p text:style-name="P21">Aelinor asintió. Sabía que Xiān tenía razón. Desde que habían cruzado el puente de Senda, no había vuelta atrás. El Perdido los llamaba. Y ellos responderí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Caminaron durante horas. El sol se movía por el cielo como un pintor pinta un cuadro: lentamente, con intención, con belleza. Xiān no podía dejar de mirar el paisaje. Todo era material para un lienzo: las rocas cubiertas de musgo, los árboles centenarios cuyas ramas se entrelazaban como pinceladas, el cielo que cambiaba de color como si una mano invisible lo estuviera pintando en tiempo real.</text:p>
      <text:p text:style-name="P21">Pero también había peligro. En las sombras de las rocas, algo se movía. Algo que los observaba. Algo que esperaba el momento perfecto para ataca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1">Aelinor: <text:span text:style-name="Emphasis">¿Lo sientes?</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Sí. Algo nos está siguiendo.</text:sp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1">Aelinor: <text:span text:style-name="Emphasis">No es algo. Es alguien. Un Espectro. La Sombra nos ha encontrado.</text:span></text:p>
      <text:p text:style-name="P21">Xiān sintió un escalofrío recorrer su espina dorsal. El pincel de hueso tembló en su mano. Estaba a punto de enfrentar a su primer enemigo real. Y no sabía si estaba list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Pero entonces recordó las palabras de Aelinor: «Puedo enseñarte a sobrevivir». Y supo que no estaba solo. Que nunca había estado solo.</text:p>
      <text:p text:style-name="P21">El Espectro emergió de las sombras. Era una figura alta, delgada, con una armadura de cuadros rotos. Sus ojos eran rojos como la sangre fresca. Su boca, una sonrisa que no debería existir en ningún rostro humano.</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1">El Espectro: <text:span text:style-name="Emphasis">El Pintor Perdido. La Sombra te llama. Ven. Ríndete. El Canvas será liberado.</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1">Xiān: <text:span text:style-name="Emphasis">Nunca.</text:span></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Y comenzó la batalla. Xiān pintó con una furia que no sabía que tenía. Pintó guerreros de luz, uno tras otro. Cada guerrero cobraba vida y se abalanzaba sobre el Espectro. Pero el Espectro era fuerte. Muy fuerte.</text:p>
      <text:p text:style-name="P21">Fue Aelinor quien cambió el curso de la batalla. Su corazón de tinta latió con una fuerza que hizo temblar el bosque. Pintó un dragón de fuego dorado que llenó el cielo de llamas. Los Espectros gritaron, se retorvieron, se deshicieron.</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Pero el precio fue alto. Xiān cayó de rodillas, tosiendo sangre. Y Aelinor... Aelinor había envejecido. Solo un par de horas, pero suficiente para que aparecieran las primeras canas en su sien.</text:p>
      <text:p text:style-name="P1">Xiān: <text:span text:style-name="Emphasis">¿Estás bien?</text:span></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1">Aelinor: <text:span text:style-name="Emphasis">Estoy viva. Eso es suficiente.</text:span></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la miró. Y supo que no solo pintaba para salvar el mundo. Pintaba para salvarla a ella.</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Y en ese momento, el pincel de hueso brilló con una luz dorada. La luz del Lost Canvas. La luz de la esperanza.</text:p>
      <text:p text:style-name="P6">VOLUMEN II</text:p>
      <text:h text:style-name="P10" text:outline-level="2">El Salon Dorado</text:h>
      <text:p text:style-name="P16">✦ ✦ ✦</text:p>
      <text:p text:style-name="P4">VOLUMEN II</text:p>
      <text:h text:style-name="P7" text:outline-level="2">El Salón Dorado</text:h>
      <text:h text:style-name="P12" text:outline-level="3">Crónicas de Xiān y Aelinor</text:h>
      <text:p text:style-name="P16">✦ ✦ ✦</text:p>
      <text:p text:style-name="P17"><text:soft-page-break/>«El salón dorado es donde los pintores se convierten en leyendas.<text:line-break/>O donde las leyendas se convierten en cenizas»</text:p>
      <text:h text:style-name="Heading_20_2" text:outline-level="2">📑 倻ndice</text:h>
      <text:p text:style-name="Text_20_body">El Interior del Palacio</text:p>
      <text:list text:style-name="L1">
        <text:list-item>
          <text:p text:style-name="P23">10. Los Secretos de Aelinor </text:p>
        </text:list-item>
        <text:list-item>
          <text:p text:style-name="P23">11. El Salón Dorado </text:p>
        </text:list-item>
        <text:list-item>
          <text:p text:style-name="P22">12. La Profecía del Lienzo Perdido </text:p>
        </text:list-item>
      </text:list>
      <text:p text:style-name="Text_20_body">El Ataque del Norte</text:p>
      <text:list text:style-name="L2">
        <text:list-item>
          <text:p text:style-name="P25">13. El Ataque del Norte </text:p>
        </text:list-item>
        <text:list-item>
          <text:p text:style-name="P25">14. El Abismo de la Vida </text:p>
        </text:list-item>
        <text:list-item>
          <text:p text:style-name="P25">15. La Traición </text:p>
        </text:list-item>
        <text:list-item>
          <text:p text:style-name="P24">16. El Reino en Llamas </text:p>
        </text:list-item>
      </text:list>
      <text:p text:style-name="Text_20_body">El Camino al Abismo</text:p>
      <text:list text:style-name="L3">
        <text:list-item>
          <text:p text:style-name="P27">17. El Reencuentro </text:p>
        </text:list-item>
        <text:list-item>
          <text:p text:style-name="P26">18. El Umbral del Abismo </text:p>
        </text:list-item>
      </text:list>
      <text:p text:style-name="Text_20_body">La Conspiración de los Pinceles</text:p>
      <text:list text:style-name="L4">
        <text:list-item>
          <text:p text:style-name="P29">19. Los Que Temen la Luz </text:p>
        </text:list-item>
        <text:list-item>
          <text:p text:style-name="P29">20. El Jardín de los Suspiros </text:p>
        </text:list-item>
        <text:list-item>
          <text:p text:style-name="P29">21. Los Tres Espectros </text:p>
        </text:list-item>
        <text:list-item>
          <text:p text:style-name="P29">22. El Dragón de Senda </text:p>
        </text:list-item>
        <text:list-item>
          <text:p text:style-name="P29">23. El Precio de la Tinta </text:p>
        </text:list-item>
        <text:list-item>
          <text:p text:style-name="P28">24. La Revelación del Lienzo </text:p>
        </text:list-item>
      </text:list>
      <text:p text:style-name="P20">Capítulo X </text:p>
      <text:h text:style-name="P11" text:outline-level="2">Los Secretos de Aelinor</text:h>
      <text:p text:style-name="P13">El silencio que siguió era el tipo de silencio que precede a los terremotos y a las revelaciones. Xiān podía escuchar su propio corazón latiendo, cada latido un recordatorio de que seguía vivo, de que seguía pintando, de que seguía pagando el precio del Canvas Perdid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La tinta en las manos de Xiān no era solo pigmento. Era vida. Era sangre. Era el precio que tendría que pagar por cada creación. Y cada trazo lo acercaba más al final, más al momento en que el Canvas consumiría todo lo que quedaba de él.</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ost Canvas no era solo un poder. Era una maldición, un regalo, una responsabilidad. Era la capacidad de crear vida a costa de la propia. Y Xiān, hijo del Pintor Supremo, era el último en llevar esa carga.</text:p>
      <text:p text:style-name="P21">Los otros pintores del Palacio observaban a Xiān con una mezcla de admiración y temor. Sabían quién era. Sabían lo que representaba. Y sabían que su llegada significaba que la Sombra estaba cerca, que la batalla final se acercaba.</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El aire mismo parecía vibrar con energía, como si el mundo contuviera la respiración. Cada átomo, cada partícula, cada fragmento de existencia parecía esperar el siguiente movimiento del pintor.</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cerró los ojos y dejó que el silencio lo envolviera. En esos momentos de quietud, podía sentir el latido del Canvas Perdido, ese poder antiguo que fluía por sus venas como tinta líquida, esperando ser liberad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Text_20_body">Habían pasado tres meses desde la primera gran batalla. Xiān seguía vivo — apenas. Cada día era un equilibrio entre la tinta y la sangre, entre lo que pintaba y lo que su cuerpo podía sostener. Aelinor, por su parte, había envejecido visiblemente: su pelo, antes oscuro, tenía ya hilos de canas, y las cicatrices de Lost Canvas se extendían por sus brazos como ríos de tinta seca.</text:p>
      <text:p text:style-name="Text_20_body">Pero lo que Xiān no sabía era el secreto que cargaba desde su llegada al Palacio de Papier.</text:p>
      <text:p text:style-name="Text_20_body">Ella era la última superviviente de la casa noble que hab&amp;iaciado el Pintor Supremo Xi Dianxing: los Señores del Crepúsculo, una familia de pintores que habían traicionado al Pintor Supremo durante la Gran Oscuridad.</text:p>
      <text:p text:style-name="Text_20_body">Hasta que Xiān preguntó:</text:p>
      <text:p text:style-name="P14"><text:span text:style-name="T1">Xiān: </text:span><text:span text:style-name="Emphasis"><text:span text:style-name="T1">¿Por qué me miras como si tú quisieras pedirme algo?</text:span></text:span></text:p>
      <text:p text:style-name="P14"><text:span text:style-name="T1">Aelinor: </text:span><text:span text:style-name="Emphasis"><text:span text:style-name="T1">Porque mi familia te traicionó, Xiān. Tus antepasados murieron por la traición de los míos.</text:span></text:span></text:p>
      <text:p text:style-name="Text_20_body">El silencio fue más pesado que cualquier batalla.</text:p>
      <text:p text:style-name="P14"><text:span text:style-name="T1">Xiān: </text:span><text:span text:style-name="Emphasis"><text:span text:style-name="T1">¿Entonces me has traído aquí para... ¿qué?</text:span></text:span></text:p>
      <text:p text:style-name="P14"><text:span text:style-name="T1">Aelinor: </text:span><text:span text:style-name="Emphasis"><text:span text:style-name="T1">Para devolverte lo que mi familla robó: tu herencia. El conocimiento del Lost Canvas original.</text:span></text:span></text:p>
      <text:p text:style-name="Text_20_body">Los jefes del Palacio de Papier — los Maestros del Lienzo — escucharon la historia en silencio: el Señor del Crepúsculo había traicionado al Pintor Supremo, el cual hab&amp;iacido su propia vida para sellar el Perdido. La familia Aelinor había quedado rota y dispersa.</text:p>
      <text:p text:style-name="Text_20_body">Aelinor, última de su linaje, había jurado encontrar al heredero y enseñarle la verdad del Lost Canvas.</text:p>
      <text:p text:style-name="P14"><text:span text:style-name="T1">Shiru: </text:span><text:span text:style-name="Emphasis"><text:span text:style-name="T1">¿Y si el heredero no quiere saber?</text:span></text:span></text:p>
      <text:p text:style-name="P14"><text:span text:style-name="T1">Aelinor: </text:span><text:span text:style-name="Emphasis"><text:span text:style-name="T1">El Perdido no preguntará si quiere.</text:span></text:span></text:p>
      <text:p text:style-name="P20">Capítulo XI </text:p>
      <text:h text:style-name="P11" text:outline-level="2">El Salón Dorado</text:h>
      <text:p text:style-name="P13">El silencio que siguió era el tipo de silencio que precede a los terremotos y a las revelaciones. Xiān podía escuchar su propio corazón latiendo, cada latido un recordatorio de que seguía vivo, de que seguía pintando, de que seguía pagando el precio del Canvas Perdid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text:soft-page-break/>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La tinta en las manos de Xiān no era solo pigmento. Era vida. Era sangre. Era el precio que tendría que pagar por cada creación. Y cada trazo lo acercaba más al final, más al momento en que el Canvas consumiría todo lo que quedaba de él.</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ost Canvas no era solo un poder. Era una maldición, un regalo, una responsabilidad. Era la capacidad de crear vida a costa de la propia. Y Xiān, hijo del Pintor Supremo, era el último en llevar esa carga.</text:p>
      <text:p text:style-name="P21">Los otros pintores del Palacio observaban a Xiān con una mezcla de admiración y temor. Sabían quién era. Sabían lo que representaba. Y sabían que su llegada significaba que la Sombra estaba cerca, que la batalla final se acercaba.</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El aire mismo parecía vibrar con energía, como si el mundo contuviera la respiración. Cada átomo, cada partícula, cada fragmento de existencia parecía esperar el siguiente movimiento del pintor.</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cerró los ojos y dejó que el silencio lo envolviera. En esos momentos de quietud, podía sentir el latido del Canvas Perdido, ese poder antiguo que fluía por sus venas como tinta líquida, esperando ser liberad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Text_20_body">El Salón Dorado era el corazón del Palacio de Papier: una sala inmensa con techo de cristal pintado con constelaciones y suelo de mármol negro. Los Maestros del Lienzo — doce ancianos pintores que se ganaban el título creando un Lost Canvas capaz de matar a un espectro — se reunían aquí para juzgar.</text:p>
      <text:p text:style-name="Text_20_body">Xiān fue llevado ante ellos por Aelinor.</text:p>
      <text:p text:style-name="P14"><text:span text:style-name="T1">Maestro Lian: </text:span><text:span text:style-name="Emphasis"><text:span text:style-name="T1">Así que eres el hijo del Pintor Supremo. Dime, ¿por qué deberíamos enseñarte?</text:span></text:span></text:p>
      <text:p text:style-name="P14"><text:span text:style-name="T1">Xiān: </text:span><text:span text:style-name="Emphasis"><text:span text:style-name="T1">No sé enseñar.</text:span></text:span></text:p>
      <text:p text:style-name="P14"><text:span text:style-name="T1">Maestro Lian: </text:span><text:span text:style-name="Emphasis"><text:span text:style-name="T1">Lo que yo digo es: ¿por qué deberíamos enseñarte?</text:span></text:span></text:p>
      <text:p text:style-name="P14"><text:span text:style-name="T1">Xiān: </text:span><text:span text:style-name="Emphasis"><text:span text:style-name="T1">Porque voy a pintar vuestro final de todas formas, con o sin vuestro permiso.</text:span></text:span></text:p>
      <text:p text:style-name="Text_20_body">Los Maestros murmuraron. Pero uno, la Maestra Su — una anciana con los ojos blancos por la tinta que había vertido durante décadas — se levantó con una sonrisa.</text:p>
      <text:p text:style-name="P14"><text:span text:style-name="T1">Maestra Su: </text:span><text:span text:style-name="Emphasis"><text:span text:style-name="T1">Tiene el espíritu. Pero la mano... eso se verá con el Combate del Lienzo.</text:span></text:span></text:p>
      <text:p text:style-name="Text_20_body">El Combate del Lienzo era la prueba de admisión: dos pintores, un lienzo vacío, la batalla más violenta posible. Xiān debía enfrentarse a Shiru.</text:p>
      <text:p text:style-name="Text_20_body">La batalla duró tres horas. Shiru pintó lobos de oscuridad que aullaban en el salón. Xiān pintó el cielo estrellado de Senda, pero esta vez no solo pintó estrellas: pintó el viento, la lluvia, el recuerdo de su madre.</text:p>
      <text:p text:style-name="Text_20_body">Y cuando el cuadro terminó, Shiru estaba de rodillas, llorando.</text:p>
      <text:p text:style-name="P14"><text:span text:style-name="T1">Shiru: </text:span><text:span text:style-name="Emphasis"><text:span text:style-name="T1">Me has pintado... ¿por qué me has pintado feliz?</text:span></text:span></text:p>
      <text:p text:style-name="P14"><text:span text:style-name="T1">Xiān: </text:span><text:span text:style-name="Emphasis"><text:span text:style-name="T1">Porque eso es lo que yo veo.</text:span></text:span></text:p>
      <text:p text:style-name="Text_20_body">Los Maestros declararon a Xiān pintor de primera fila.</text:p>
      <text:p text:style-name="Text_20_body">Pero la ceremonia se rompió con un grito: los Despertados habían vuelto a atacar, y esta vez venían del norte.</text:p>
      <text:p text:style-name="P20">Capítulo XII </text:p>
      <text:h text:style-name="P11" text:outline-level="2">La Profecía del Lienzo Perdido</text:h>
      <text:p text:style-name="P13">El silencio que siguió era el tipo de silencio que precede a los terremotos y a las revelaciones. Xiān podía escuchar su propio corazón latiendo, cada latido un recordatorio de que seguía vivo, de que seguía pintando, de que seguía pagando el precio del Canvas Perdid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La tinta en las manos de Xiān no era solo pigmento. Era vida. Era sangre. Era el precio que tendría que pagar por cada creación. Y cada trazo lo acercaba más al final, más al momento en que el Canvas consumiría todo lo que quedaba de él.</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ost Canvas no era solo un poder. Era una maldición, un regalo, una responsabilidad. Era la capacidad de crear vida a costa de la propia. Y Xiān, hijo del Pintor Supremo, era el último en llevar esa carga.</text:p>
      <text:p text:style-name="P21">Los otros pintores del Palacio observaban a Xiān con una mezcla de admiración y temor. Sabían quién era. Sabían lo que representaba. Y sabían que su llegada significaba que la Sombra estaba cerca, que la batalla final se acercaba.</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El aire mismo parecía vibrar con energía, como si el mundo contuviera la respiración. Cada átomo, cada partícula, cada fragmento de existencia parecía esperar el siguiente movimiento del pintor.</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cerró los ojos y dejó que el silencio lo envolviera. En esos momentos de quietud, podía sentir el latido del Canvas Perdido, ese poder antiguo que fluía por sus venas como tinta líquida, esperando ser liberad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Text_20_body">La Maestra Su reunió a Xiān y a Aelinor en secreta del Palacio. Les mostró un rollo de pergamino antiguo, manchado de sangre y tinta: el Perdicio Original.</text:p>
      <text:p text:style-name="P14"><text:span text:style-name="T1">Maestra Su: </text:span><text:span text:style-name="Emphasis"><text:span text:style-name="T1">El Pintor Supremo Xi Dianxing no encerró a la Sombra sólo con su vida. La encerró con la suya propia: pintó su alma dentro del Canvas original, y la Sombra quedó atrapada en el cuadro. Pero el Canvas se está deteriorando. Se sabe porque los Despertados atacan con más fuerza cada día.</text:span></text:span></text:p>
      <text:p text:style-name="P14"><text:span text:style-name="T1">Aelinor: </text:span><text:span text:style-name="Emphasis"><text:span text:style-name="T1">¿Cuándo se romperá el sello?</text:span></text:span></text:p>
      <text:p text:style-name="P14"><text:span text:style-name="T1">Maestra Su: </text:span><text:span text:style-name="Emphasis"><text:span text:style-name="T1">Cuando el último pintor consuma su vida intentando repararlo. O cuando el Perdido envíe suficientes espectros para destruirlo desde fuera.</text:span></text:span></text:p>
      <text:p text:style-name="Text_20_body">Xiān preguntó qué era la profecía del Lienzo Perdido que tanto los Maestros temían.</text:p>
      <text:p text:style-name="P14"><text:span text:style-name="T1">Maestra Su: </text:span><text:span text:style-name="Emphasis"><text:span text:style-name="T1">La profecía dice: «El último pintor morirá pintando. El úlpincel aceptará su destino o el canvas se desgarrará.»</text:span></text:span></text:p>
      <text:p text:style-name="Text_20_body">Xiān entendió el dilema: si seguía pintando para reparar el sello, moriría. Si no lo hacía, la Sombra escaparía y el mundo se sumiría en la oscuridad.</text:p>
      <text:p text:style-name="P14"><text:span text:style-name="T1">Xiān: </text:span><text:span text:style-name="Emphasis"><text:span text:style-name="T1">Y si pinto otra cosa? Si pinto un nuevo Canvas, más allá del original?</text:span></text:span></text:p>
      <text:p text:style-name="Text_20_body">Los Maestros se quedaron helados. Nadie había considerado esa posibilidad.</text:p>
      <text:p text:style-name="P14"><text:span text:style-name="T1">Maestra Su: </text:span><text:span text:style-name="Emphasis"><text:span text:style-name="T1">Sería... inaudito. El costo sería tu vida entera. No un mes, no un año. Todo. Incluso los recuerdos de tu vida.</text:span></text:span></text:p>
      <text:p text:style-name="P20">Capítulo XIII </text:p>
      <text:h text:style-name="P11" text:outline-level="2">El Ataque del Norte</text:h>
      <text:p text:style-name="P13">El silencio que siguió era el tipo de silencio que precede a los terremotos y a las revelaciones. Xiān podía escuchar su propio corazón latiendo, cada latido un recordatorio de que seguía vivo, de que seguía pintando, de que seguía pagando el precio del Canvas Perdid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text:soft-page-break/>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La tinta en las manos de Xiān no era solo pigmento. Era vida. Era sangre. Era el precio que tendría que pagar por cada creación. Y cada trazo lo acercaba más al final, más al momento en que el Canvas consumiría todo lo que quedaba de él.</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ost Canvas no era solo un poder. Era una maldición, un regalo, una responsabilidad. Era la capacidad de crear vida a costa de la propia. Y Xiān, hijo del Pintor Supremo, era el último en llevar esa carga.</text:p>
      <text:p text:style-name="P21">Los otros pintores del Palacio observaban a Xiān con una mezcla de admiración y temor. Sabían quién era. Sabían lo que representaba. Y sabían que su llegada significaba que la Sombra estaba cerca, que la batalla final se acercaba.</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El aire mismo parecía vibrar con energía, como si el mundo contuviera la respiración. Cada átomo, cada partícula, cada fragmento de existencia parecía esperar el siguiente movimiento del pintor.</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cerró los ojos y dejó que el silencio lo envolviera. En esos momentos de quietud, podía sentir el latido del Canvas Perdido, ese poder antiguo que fluía por sus venas como tinta líquida, esperando ser liberad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Text_20_body">El ataque del Norte fue la mayor ofensiva del Perdido desde la Gran Oscuridad. Tres mil espectros marcharon hacia el Palacio de Papier, liderados por el Jinete del Hambre, el sobreviviente de la primera gran batalla. El ejército de las sombras cubrió las montañas como una segunda noche.</text:p>
      <text:p text:style-name="Text_20_body">Xiān, Aelinor y Shiru marcharon con los otros pintores para enfrentarlo. Fue la batalla más larga: tres días de invierno, de lienzos pintados a la carrera, de vidas consumidas en minutos.</text:p>
      <text:p text:style-name="P14"><text:span text:style-name="T1">Shiru: </text:span><text:span text:style-name="Emphasis"><text:span text:style-name="T1">¡Pinta un ejército! ¡Pinta un muro! Haz algo, Xiān!</text:span></text:span></text:p>
      <text:p text:style-name="Text_20_body">Pero Xiān no podía. Estaba débiles, sus manos temblaban, su visión estaba borrosa. Había usado demasiada vida.</text:p>
      <text:p text:style-name="Text_20_body">Fue Aelinor quien tomó el pincel de hueso y pintó un ejército que no era de tinta, sino de su propia sangre. La batalla terminó con la retirada de los espectros, pero Aelinor quedó en el suelo, envejecida décadas, apenas viva.</text:p>
      <text:p text:style-name="Text_20_body">Xiān corrió hacia ella.</text:p>
      <text:p text:style-name="P14"><text:span text:style-name="T1">Xiān: </text:span><text:span text:style-name="Emphasis"><text:span text:style-name="T1">¿Por qué...?</text:span></text:span></text:p>
      <text:p text:style-name="P14"><text:span text:style-name="T1">Aelinor: </text:span><text:span text:style-name="Emphasis"><text:span text:style-name="T1">Porque me debía una batalla.</text:span></text:span></text:p>
      <text:p text:style-name="P20">Capítulo XIV </text:p>
      <text:h text:style-name="P11" text:outline-level="2">El Abismo de la Vida</text:h>
      <text:p text:style-name="P13">El silencio que siguió era el tipo de silencio que precede a los terremotos y a las revelaciones. Xiān podía escuchar su propio corazón latiendo, cada latido un recordatorio de que seguía vivo, de que seguía pintando, de que seguía pagando el precio del Canvas Perdido.</text:p>
      <text:p text:style-name="P21">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p>
      <text:p text:style-name="P21">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p>
      <text:p text:style-name="P21">Souma le enseñó la primera lección: el Lost Canvas no es técnica. Es entrega. Tu padre podía pintar un mundo en una hora porque entregaba todo su ser. No tenía miedo de morir. No tenía miedo de perder. Solo tenía miedo de no crear. Y eso era lo que lo hacía invencible.</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p>
      <text:p text:style-name="P21">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p>
      <text:p text:style-name="P21">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p>
      <text:p text:style-name="P21">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p>
      <text:p text:style-name="P21">Souma era más que un mentor. Era un padre para Xiān. Le enseñó no solo a pintar, sino a vivir. Le enseñó que el poder no era un fin, sino un medio. Y que la verdadera fuerza no estaba en la capacidad de destruir, sino en la capacidad de proteger.</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p>
      <text:p text:style-name="P21">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p>
      <text:p text:style-name="P21">La Sombra no era solo oscuridad. Era memoria. La memoria de un mundo que existía antes de la luz. Un mundo donde no había dolor, no había muerte, no había pérdida. Y la Sombra quería volver a ese mundo. Quiere borrar la luz. Quiere borrar la vida. Quiere volver al vacío.</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p>
      <text:p text:style-name="P21">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p>
      <text:p text:style-name="P21">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p>
      <text:p text:style-name="P21">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p>
      <text:p text:style-name="P21">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p>
      <text:p text:style-name="P21">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p>
      <text:p text:style-name="P21">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p>
      <text:p text:style-name="P21">La Sombra atacó al amanecer. No con un ejército. Con una sola figura. Una figura que caminaba sola hacia el Palacio, sin armadura, sin armas, sin miedo. Era Yami. Y detrás de él, la oscuridad se extendía como un océano de sombras.</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Xiān sintió la explosión desde el patio. Sintió cómo el corazón de Aelinor dejaba de latir. Y en el lienzo, la oscuridad que había comenzado a pintar cobró vida. La Sombra estaba saliendo. Y si no terminaba el lienzo, todo habría sido en vano.</text:p>
      <text:p text:style-name="P21">Souma le trajo el color de Aelinor: un punto de luz carmesí, cálido, latiendo. Era el último latido del corazón de tinta. La chispa de Aelinor. Y Xiān lo mezcló con su tinta. Y pintó el último trazo.</text:p>
      <text:p text:style-name="P21">La batalla fue épica. Xiān pintó guerreros de luz que llenaron el cielo. Aelinor pintó dragones de fuego que iluminaron la oscuridad. Souma lanzó su Tenkyūha con una fuerza que hizo temblar la tierra. Pero la Sombra era más fuerte. Mucho más fuerte.</text:p>
      <text:p text:style-name="P21">Cuando todo parecía perdido, Xiān tomó una decisión. Pintaría el Lienzo Primordial. No importaba el precio. No importaba si moría. Porque si no lo hacía, todos morirían. Y eso era inaceptable.</text:p>
      <text:p text:style-name="P21">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p>
      <text:p text:style-name="P21">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p>
      <text:p text:style-name="P21">Cuando todo parecía perdido, Xiān tomó una decisión. Pintaría el Lienzo Primordial. No importaba el precio. No importaba si moría. Porque si no lo hacía, todos morirían. Y eso era inaceptable.</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guerra terminó. Los Espectros se disolvieron. El Palacio de Papier estaba en ruinas, pero de pie. Souma encontró a Xiān en el patio, acostado sobre el Lienzo Primordial, incapaz de moverse. Su cuerpo era el de un anciano. Pero estaba vivo.</text:p>
      <text:p text:style-name="P21">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p>
      <text:p text:style-name="P21">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p>
      <text:p text:style-name="P21">La Sombra gritó cuando el lienzo se cerró. Un grito que resonó en todo el mundo, que hizo temblar las montañas, que rompió el cielo. Y entonces, el silencio. Un silencio absoluto. Porque la Sombra había sido sellada. Para siempre.</text:p>
      <text:p text:style-name="P21">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p>
      <text:p text:style-name="P21">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p>
      <text:p text:style-name="P21"><text:soft-page-break/>La Sombra gritó cuando el lienzo se cerró. Un grito que resonó en todo el mundo, que hizo temblar las montañas, que rompió el cielo. Y entonces, el silencio. Un silencio absoluto. Porque la Sombra había sido sellada. Para siempre.</text:p>
      <text:p text:style-name="P21">Xiān cayó de rodillas. Su cuerpo estaba roto. Su alma estaba rota. Pero estaba vivo. Y el mundo estaba a salvo. Y eso era suficiente.</text:p>
      <text:p text:style-name="P21">La tinta en las manos de Xiān no era solo pigmento. Era vida. Era sangre. Era el precio que tendría que pagar por cada creación. Y cada trazo lo acercaba más al final, más al momento en que el Canvas consumiría todo lo que quedaba de él.</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text:p>
      <text:p text:style-name="P21">Xiān cayó de rodillas. Su cuerpo estaba roto. Su alma estaba rota. Pero estaba vivo. Y el mundo estaba a salvo. Y eso era suficiente.</text:p>
      <text:p text:style-name="P21">Aelinor corrió hacia él. Lo abrazó. Y lloró. No de tristeza. De alegría. Porque Xiān había sobrevivido. Porque la batalla había terminado. Porque el mundo estaba a salvo.</text:p>
      <text:p text:style-name="P21">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p>
      <text:p text:style-name="P21">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p>
      <text:p text:style-name="P21">Aelinor corrió hacia él. Lo abrazó. Y lloró. No de tristeza. De alegría. Porque Xiān había sobrevivido. Porque la batalla había terminado. Porque el mundo estaba a salvo.</text:p>
      <text:p text:style-name="P21">Souma se acercó y puso una mano en el hombro de Xiān. Lo lograste, dijo. Tu padre estaría orgulloso. Y Xiān sonrió. Porque sabía que era verdad.</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Souma se acercó y puso una mano en el hombro de Xiān. Lo lograste, dijo. Tu padre estaría orgulloso. Y Xiān sonrió. Porque sabía que era verdad.</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p>
      <text:p text:style-name="P21">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p>
      <text:p text:style-name="P21">El Palacio de Papier fue reconstruido. Los estudiantes volvieron a pintar. Y Xiān... Xiān enseñó a una nueva generación de pintores del Lost Canvas. Les enseñó que el poder no era un arma, sino un regalo. Y que el verdadero arte era crear algo que valiera la pena morir.</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Lost Canvas no era solo un poder. Era una maldición, un regalo, una responsabilidad. Era la capacidad de crear vida a costa de la propia. Y Xiān, hijo del Pintor Supremo, era el último en llevar esa carga.</text:p>
      <text:p text:style-name="P21">Los otros pintores del Palacio observaban a Xiān con una mezcla de admiración y temor. Sabían quién era. Sabían lo que representaba. Y sabían que su llegada significaba que la Sombra estaba cerca, que la batalla final se acercaba.</text:p>
      <text:p text:style-name="P21">Los años pasaron. Xiān envejeció. Sus manos se arrugaron. Su pelo se volvió blanco. Pero sus ojos seguían brillando con la misma luz que siempre había tenido. La luz de un pintor. La luz de un héroe. La luz de un hombre que había salvado al mundo.</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El aire mismo parecía vibrar con energía, como si el mundo contuviera la respiración. Cada átomo, cada partícula, cada fragmento de existencia parecía esperar el siguiente movimiento del pintor.</text:p>
      <text:p text:style-name="P21">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p>
      <text:p text:style-name="P21">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p>
      <text:p text:style-name="P21">Xiān cerró los ojos y dejó que el silencio lo envolviera. En esos momentos de quietud, podía sentir el latido del Canvas Perdido, ese poder antiguo que fluía por sus venas como tinta líquida, esperando ser liberado.</text:p>
      <text:p text:style-name="P21">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p>
      <text:p text:style-name="P21">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p>
      <text:p text:style-name="Text_20_body">Aelinor estaba muriendo. No era una herida de tinta, era el precio del Lost Canvas: había dado demasiado de su alma y ahora solo le quedaban semanas.</text:p>
      <text:p text:style-name="Text_20_body">Xiān no podía aceptarlo. Preguntó a los Maestros, al doctor, a los ancianos del Palacio.</text:p>
      <text:p text:style-name="Text_20_body">El Maestro Lian le dijo: <text:span text:style-name="Emphasis">«Puedes pintarla. Puedes darle tu vida a través del canvas. Pero el costo será».</text:span></text:p>
      <text:p text:style-name="P30"><text:span text:style-name="Emphasis">Xiān: Cualquier cosa.</text:span></text:p>
      <text:p text:style-name="Text_20_body"><text:span text:style-name="Emphasis">Esa noche, Xiān frente a Aelinor, comenzó a pintarla. No como era ahora — envejecida y cansada — sino como la había visto por primera vez: con la capa carmesí y la mirada triste.</text:span></text:p>
      <text:p text:style-name="Text_20_body"><text:span text:style-name="Emphasis">A medida que pintaba, la vida fluía de él a ella. Sintió cómo sus propios recuerdos se desvanecían: Senda, su padre, su madre. Todo se convertía en tinta.</text:span></text:p>
      <text:p text:style-name="Text_20_body"><text:span text:style-name="Emphasis">Pero cuando Aelinor abró los ojos — jovenes otra vez, sin canas, sin cicatrices — Xiān cayó.</text:span></text:p>
      <text:p text:style-name="Text_20_body"><text:span text:style-name="Emphasis">Había dado un año de su vida.</text:span></text:p>
      <text:p text:style-name="Text_20_body"><text:span text:style-name="Emphasis">Fue suficiente para que ella viviera. Y fue el inicio de su camino hacia el final.</text:span></text:p>
      <text:p text:style-name="P18"><text:span text:style-name="Emphasis">✦ ✦ ✦</text:span></text:p>
      <text:p text:style-name="P19"><text:span text:style-name="Emphasis"><text:span text:style-name="T3">Capítulos XV–XVIII </text:span></text:span></text:p>
      <text:h text:style-name="P8" text:outline-level="2"><text:span text:style-name="Emphasis"><text:span text:style-name="T3">La Traición, el Reino en Llamas, el Reencuentro y el Umbral del Abismo</text:span></text:span></text:h>
      <text:p text:style-name="P13"><text:span text:style-name="Emphasis">Shiru el traicionó. Había sido corrompido por la Sombra, que le prometió un poder sin costo. En la noche, abrió las puertas del Palacio a los espectros. Cientos murieron. El Maestro Lian fue asesinado con el pincel de hueso en man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30"><text:span text:style-name="Emphasis">Shiru: El Perdido me ofreció un poder que no cuesta vida. ¿Qué podrías tú ofrecerme que igualara es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tuvo que pintar contra Shiru. Y la pelea terminó con Shiru huyendo hacia el Perdido, al norte oscur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reino ardía. Los espectros hab&amp;iacido las ciudades del sur. Miles de refugiados huían hacia el Palacio de Papier, último bast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Xiān y Aelinor organizaron la defensa. Pintaron murallas de fuego, ejércitos de luz, armas de tinta que los soldados podían blandir. Durante un mes, resistieron.</text:span></text:p>
      <text:p text:style-name="P21"><text:span text:style-name="Emphasis">Shiru volvió herido y lleno de arrepentimiento. La Sombra había rechazado una vez que perdió su útilessh. Estaba muriendo, consumido por la Sombra misma 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30"><text:span text:style-name="Emphasis">Shiru: Xiān... no puedo... pintar más...</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lo sostu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30"><text:span text:style-name="Emphasis">Xiān: No pintes. Sólo respira. Nos vamos juntos al final.</text:span></text:p>
      <text:p text:style-name="P21"><text:span text:style-name="Emphasis">Shiru sonrió y murió en los brazos de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y Aelinor reunieron a los últimos setenta pintores. El Perdido estaba abriendo el camino desde el norte. Era ir hacia él o morir allí.</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30"><text:span text:style-name="Emphasis">Aelinor: Hemos sobrevivido a todo. No moriré en el camin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C norte. Hacia el abismo del Perdido hacia el final de todo. Y el tercer volumen de esta ónica narra lo que encontraron allí.</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18"><text:span text:style-name="Emphasis">✦ ✦ ✦</text:span></text:p>
      <text:p text:style-name="P19"><text:span text:style-name="Emphasis"><text:span text:style-name="T3">Capítulo XIX </text:span></text:span></text:p>
      <text:h text:style-name="P8" text:outline-level="2"><text:span text:style-name="Emphasis"><text:span text:style-name="T3">Los Que Temen la Luz</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oft-page-break/><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La noticia de la traición de Shiru se extendió por el Palacio de Papier como tinta en agua. Pero no fue el dolor lo que dominó los pasillos de mármol, sino el miedo. Los pintores que habían aceptado a Xiān como un héroe ahora lo miraban con recelo. ¿Qué clase de poder era aquel que podía corromper a uno de los suyos? ¿Qué garantía había de que Xiān no se convirtiera en otra amenaza?</text:span></text:p>
      <text:p text:style-name="Text_20_body"><text:span text:style-name="Emphasis">El Maestro Feng, un pintor de barba larga y ojos como cuentas de ónice, convocó una reunión de los antiguos en la Sala de los Espejos Rotos. Allí, lejos de los oídos de los jóvenes, habló sin rodeos:</text:span></text:p>
      <text:p text:style-name="P30"><text:span text:style-name="Emphasis">Maestro Feng: El muchacho es peligroso. Su padre fue el Pintor Supremo, sí, pero también fue el que creó el sello que ahora se desmorona. ¿Y si el hijo sigue el mismo camino? ¿Y si su poder no tiene límite porque su alma está tocada por la misma oscuridad?</text:span></text:p>
      <text:p text:style-name="Text_20_body"><text:span text:style-name="Emphasis">La Maestra Su, desde su rincón, respondió con voz serena pero firme:</text:span></text:p>
      <text:p text:style-name="P30"><text:span text:style-name="Emphasis">Maestra Su: Xiān no está tocado por la oscuridad. Está marcado por la luz. La misma luz que su padre usó para sellar a la Sombra. Si temen su poder, es porque no entienden lo que cuesta.</text:span></text:p>
      <text:p text:style-name="Text_20_body"><text:span text:style-name="Emphasis">Pero Feng no estaba solo en su temor. La mayoría de los pintores de nivel medio — aquellos que habían dedicado décadas a dominar el Lost Canvas sin lograr la gracia de Xiān — murmuraban en los corredores. Algunos hablaban de encerrarlo hasta que pasara la amenaza. Otros, más radicales, sugerían que se le arrebatara el pincel de hueso y se le prohibiera pintar.</text:span></text:p>
      <text:p text:style-name="Text_20_body"><text:span text:style-name="Emphasis">Fue en medio de esta tensión cuando Xiān descubrió la conspiración. Aelinor lo encontró en la biblioteca, rodeado de pergaminos, con los ojos inyectados en sangre.</text:span></text:p>
      <text:p text:style-name="P30"><text:span text:style-name="Emphasis">Aelinor: ¿Qué estás buscando?</text:span></text:p>
      <text:p text:style-name="P30"><text:span text:style-name="Emphasis">Xiān: Pruebas. Si mi padre selló a la Sombra, entonces debe haber un método registrado. Algo que no requiera que yo muera pintando. Pero los están ocultando, Aerin. Los Maestros saben más de lo que dicen.</text:span></text:p>
      <text:p text:style-name="Text_20_body"><text:span text:style-name="Emphasis">La revelación cambió todo. Aelinor comprendió que la política del Palacio no era solo envidia: era un juego de poder donde la información era la moneda más valiosa. Los Maestros tenían razones para mantener a Xiān en la oscuridad, y esas razones iban más allá de la protección del muchacho.</text:span></text:p>
      <text:p text:style-name="Text_20_body"><text:span text:style-name="Emphasis">Esa noche, Aelinor confrontó a Souma, el Santo de Oro de Libra, el mentor que había observado todo desde la distancia con su caracterísitica calma. Souma era el único Gold Saint que permanecía en el Palacio, y su lealtad era un enigma para todos.</text:span></text:p>
      <text:p text:style-name="P30"><text:span text:style-name="Emphasis">Aelinor: Tú sabes lo que están tramando. Feng y los otros. ¿Por qué no haces nada?</text:span></text:p>
      <text:p text:style-name="P30"><text:span text:style-name="Emphasis">Souma: Porque el miedo es un maestro más sabio que yo. Los pintores necesitan sentir que tienen el control. Si intervengo, solo aumentará la paranoia. Xiān debe demostrar su valor en el campo de batalla, no en las palabras.</text:span></text:p>
      <text:p text:style-name="P30"><text:span text:style-name="Emphasis">Aelinor: ¿Y si no hay tiempo para eso? ¿Y si la Sombra ataca de nuevo antes de que se den cuenta?</text:span></text:p>
      <text:p text:style-name="Text_20_body"><text:span text:style-name="Emphasis">Souma la miró con sus ojos antiguos, cargados de siglos de guerra y paciencia.</text:span></text:p>
      <text:p text:style-name="P14"><text:span text:style-name="Emphasis"><text:span text:style-name="T2">Souma: Entonces Xiān pinta ... [OUTPUT TRUNCATED - 3096 chars omitted out of 53096 total] ... "speaker"&gt;Xiān:</text:span></text:span><text:span text:style-name="Emphasis"> Cuando era niño, mi padre me llevaba a un jardín en Senda. No era tan hermoso como este, pero tenía un ciruelo que florecía en invierno. Me decía que las flores más fuertes son las que nacen en el frío.</text:span></text:p>
      <text:p text:style-name="P30"><text:span text:style-name="Emphasis">Aelinor: ¿Y tú? ¿Eres una flor de invierno?</text:span></text:p>
      <text:p text:style-name="P30"><text:span text:style-name="Emphasis">Xiān: No lo sé. Pero sé que mientras tenga a alguien con quien compartir el frío, podré seguir floreciendo.</text:span></text:p>
      <text:p text:style-name="Text_20_body"><text:span text:style-name="Emphasis">Ella sonrió — una sonrisa genuina, sin la armadura que siempre llevaba — y apoyó su cabeza en su hombro. El gesto era tan simple, tan humano, que Xiān sintió que el peso de la profecía se aliviaba un instante.</text:span></text:p>
      <text:p text:style-name="P30"><text:span text:style-name="Emphasis">Aelinor: Xiān... cuando todo termine... ¿qué harás?</text:span></text:p>
      <text:p text:style-name="P30"><text:span text:style-name="Emphasis">Xiān: Si sobrevivo? Pintaré. Pero no batallas ni espectros. Pintaré este jardín. Te pintaré a ti, bajo este sauce, con la luz del atardecer. Y colgaré el cuadro donde nadie pueda tocarlo, para que el mundo recuerde que existió un momento de paz en medio de la guerra.</text:span></text:p>
      <text:p text:style-name="Text_20_body"><text:span text:style-name="Emphasis">Ella cerró los ojos. Una lágrima corrió por su mejilla, pero no de tristeza. De gratitud. De algo más profundo que aún no tenía nombre.</text:span></text:p>
      <text:p text:style-name="P30"><text:span text:style-name="Emphasis">Aelinor: Prométeme.</text:span></text:p>
      <text:p text:style-name="P30"><text:span text:style-name="Emphasis">Xiān: Te lo prometo.</text:span></text:p>
      <text:p text:style-name="Text_20_body"><text:span text:style-name="Emphasis">Permanecieron allí hasta que las estrellas aparecieron. No hablaron más. No hacía falta. El lenguaje de sus cuerpos — la cercanía, el calor compartido, el latido sincronizado de sus corazones — decía todo lo que las palabras no podían.</text:span></text:p>
      <text:p text:style-name="Text_20_body"><text:span text:style-name="Emphasis">Fue entonces cuando Souma los encontró. El Santo de Oro apareció entre las sombras del jardín con una expresión que Xiān nunca le había visto: urgencia.</text:span></text:p>
      <text:p text:style-name="P30"><text:span text:style-name="Emphasis">Souma: Ha llegado. La Sombra ha enviado a tres espectros simultáneamente. Uno por cada punto cardinal. Están atacando el Palacio desde tres direcciones a la vez.</text:span></text:p>
      <text:p text:style-name="Text_20_body"><text:span text:style-name="Emphasis">Xiān se levantó. Aelinor se levantó. El momento de paz había terminado.</text:span></text:p>
      <text:p text:style-name="Text_20_body"><text:span text:style-name="Emphasis">Pero mientras corrían hacia el Palacio, Xiān apretó la mano de Aelinor una última vez. Y ella le devolvió el gesto. No era un adiós. Era una promesa.</text:span></text:p>
      <text:p text:style-name="P18"><text:span text:style-name="Emphasis">✦ ✦ ✦</text:span></text:p>
      <text:p text:style-name="P19"><text:span text:style-name="Emphasis"><text:span text:style-name="T3">Capítulo XXI </text:span></text:span></text:p>
      <text:h text:style-name="P8" text:outline-level="2"><text:span text:style-name="Emphasis"><text:span text:style-name="T3">Los Tres Espectros</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oft-page-break/><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El ataque fue sin precedentes. La Sombra, en su astucia infinita, hab&amp;iacido a tres de sus más poderosos espectros simultáneamente: el Aullador del Este, una criatura de viento y dientes que destruía todo con su grito; la Serpiente del Sur, un espectro de fuego que envenenaba la tierra por donde pasaba; y el Coloso del Oeste, una montaña de huesos y sombras que aplastaba con solo moverse.</text:span></text:p>
      <text:p text:style-name="Text_20_body"><text:span text:style-name="Emphasis">El Palacio de Papier se preparó para la defensa en tres frentes. Souma, el Santo de Oro de Libra, tomó el mando con una calma que contrastaba con el caos que se desataba.</text:span></text:p>
      <text:p text:style-name="P30"><text:span text:style-name="Emphasis">Souma: Xiān, tú enfrentarás al Aullador. Su grito destruye la concentración, pero tu lienzo es el único que puede contenerlo. Aelinor, la Serpiente del Sur es tuya. Tu sangre de Señores del Crepúsculo tiene resistencia al fuego. Yo me encargaré del Coloso.</text:span></text:p>
      <text:p text:style-name="P30"><text:span text:style-name="Emphasis">Xiān: ¿Tú solo? Es un Coloso...</text:span></text:p>
      <text:p text:style-name="P30"><text:span text:style-name="Emphasis">Souma: Soy un Santo de Oro, muchacho. He derrotado cosas peores antes de que nacieras. Ahora ve. Pinta con todo lo que tienes.</text:span></text:p>
      <text:h text:style-name="Heading_20_3" text:outline-level="3"><text:span text:style-name="Emphasis">La Batalla del Este</text:span></text:h>
      <text:p text:style-name="Text_20_body"><text:span text:style-name="Emphasis">Xiān corrió hacia el muro oriental donde el Aullador ya comenzaba su asedio. El espectro era una masa de nubes negras con una boca que se abría como un abismo, y cada grito que lanzaba agrietaba la piedra y hacía sangrar los oídos de los defensores. Los pintores caían de rodillas, incapaces de concentrarse para crear sus lienzos.</text:span></text:p>
      <text:p text:style-name="Text_20_body"><text:span text:style-name="Emphasis">Pero Xiān había aprendido algo en el jardín de los Suspiros. La paz no era ausencia de ruido: era la capacidad de encontrar el silencio interior incluso en medio del caos. Cerró los ojos. Respiró. Y cuando los abró, su pincel ya se movía.</text:span></text:p>
      <text:p text:style-name="Text_20_body"><text:span text:style-name="Emphasis">Pintó un muro de sonido. No un muro físico, sino uno hecho de la música de Senda: el canto de los pájaros al amanecer, el murmullo del río, la risa de su madre. Cada nota era un hilo de tinta que absorbía el grito del Aullador y lo convertía en silencio.</text:span></text:p>
      <text:p text:style-name="Text_20_body"><text:span text:style-name="Emphasis">El espectro luchó, su voz haciendo temblar los cimientos del Palacio. Pero Xiān pintaba más rápido. Pintó una jaula de melodía, y cuando el Aullador lanzó su grito más poderoso, la jaula se cerró sobre él. El espectro se disolvió en un acorde final, una nota sostenida que se desvaneció en el aire.</text:span></text:p>
      <text:p text:style-name="Text_20_body"><text:span text:style-name="Emphasis">Xiān cayó de rodillas. Había gastado semanas de vida en esa batalla. Pero el Este estaba a salvo.</text:span></text:p>
      <text:h text:style-name="Heading_20_3" text:outline-level="3"><text:span text:style-name="Emphasis">La Batalla del Sur</text:span></text:h>
      <text:p text:style-name="Text_20_body"><text:span text:style-name="Emphasis">Aelinor enfrentó a la Serpiente del Sur en los campos de entrenamiento. El espectro era una lengua de fuego verde que arrasaba todo a su paso, convirtiendo la tierra en cristal negro. Los otros pintores retrocedían, sus lienzos ardiendo antes de poder completarse.</text:span></text:p>
      <text:p text:style-name="Text_20_body"><text:span text:style-name="Emphasis">Pero Aelinor no retrocedió. Su linaje tenía el fuego en la sangre — había sido su ancestro quien traicionó al Pintor Supremo, sí, pero también había sido su familia la que dominó las artes del Lost Canvas como ninguna otra. Tomó el pincel de hueso y mojó las ceras en su propia sangre.</text:span></text:p>
      <text:p text:style-name="Text_20_body"><text:span text:style-name="Emphasis">Pintó un océano. No de agua, sino de la memoria del agua: la lluvia sobre los tejados de su infancia, el rocío del amanecer, las lágrimas de su madre cuando última vez la vio. Cada gota era un hechizo de extinción, y cuando el océano chocó contra la Serpiente, el fuego siseó y murió.</text:span></text:p>
      <text:p text:style-name="Text_20_body"><text:span text:style-name="Emphasis">Pero el espectro tenía una última carta. Antes de disolverse, lanzó una lengua de fuego que alcanzó a Aelinor en el hombro. Ella gritó, pero no cayó. Con la mano libre, terminó el trazo final que completó el océano y ahogó a la Serpiente para siempre.</text:span></text:p>
      <text:p text:style-name="Text_20_body"><text:span text:style-name="Emphasis">El precio: su hombro derecho quedó marcado con una quemadura de tinta que nunca sanaría. Y otro mes de vida consumido.</text:span></text:p>
      <text:h text:style-name="Heading_20_3" text:outline-level="3"><text:span text:style-name="Emphasis">La Batalla del Oeste</text:span></text:h>
      <text:p text:style-name="Text_20_body"><text:span text:style-name="Emphasis">Souma caminó solo hacia el Coloso. El Santo de Oro no llevaba pincel. No lo necesitaba. Su cosmos ardía como un sol, y cuando el Coloso levantó su puño de huesos para aplastarlo, Souma levantó una mano y detuvo el golpe con el poder de su voluntad.</text:span></text:p>
      <text:p text:style-name="P30"><text:span text:style-name="Emphasis">Souma: He visto nacer y morir estrellas. He contemplado el paso de los milenios. ¿Qué eres tú comparado con la eternidad?</text:span></text:p>
      <text:p text:style-name="Text_20_body"><text:span text:style-name="Emphasis">El Coloso rugió. Souma respondió con un golpe de cosmos que desintegró al espectro en mil fragmentos de sombra. La batalla duró apenas un minuto. Pero cuando Souma se giró para regresar al Palacio, Xiān vio algo que nunca había visto en el rostro del Santo de Oro: cansancio.</text:span></text:p>
      <text:p text:style-name="Text_20_body"><text:span text:style-name="Emphasis">Las tres batallas habían terminado. El Palacio estaba a salvo. Pero el mensaje de la Sombra era claro: podía enviar a sus mejores guerreros en cualquier momento. Y la próxima vez, no serían tres espectros. Sería un ejército.</text:span></text:p>
      <text:p text:style-name="P18"><text:span text:style-name="Emphasis">✦ ✦ ✦</text:span></text:p>
      <text:p text:style-name="P19"><text:span text:style-name="Emphasis"><text:span text:style-name="T3">Capítulo XXII </text:span></text:span></text:p>
      <text:h text:style-name="P8" text:outline-level="2"><text:span text:style-name="Emphasis"><text:span text:style-name="T3">El Dragón de Senda</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La noche después de las tres batallas, Xiān no podía dormir. Cada vez que cerraba los ojos, veía la misma visión: el jardín de los Suspiros destruido, el Palacio de Papier en cenizas, Aelinor tendiéndole la mano desde un abismo de sombras. La profecía pesaba sobre él como una losa.</text:span></text:p>
      <text:p text:style-name="Text_20_body"><text:span text:style-name="Emphasis">Fue entonces cuando escuchó la voz de su padre. No un recuerdo, no una alucinación: una presencia real, resonando desde el interior de su pincel de hueso.</text:span></text:p>
      <text:p text:style-name="P30"><text:span text:style-name="Emphasis">Xi Dianxing: Hijo mío. Ha llegado el momento de pintar lo que nunca debiste pintar.</text:span></text:p>
      <text:p text:style-name="P30"><text:span text:style-name="Emphasis">Xiān: ¿Padre? ¿Dónde estás?</text:span></text:p>
      <text:p text:style-name="P30"><text:span text:style-name="Emphasis">Xi Dianxing: En el Canvas. En el sello. En cada pincelada que has dado desde que llegaste al Palacio. Soy la tinta que usas, el lienzo sobre el que pintas. Y te digo esto: la Sombra enviará a su general la próxima vez. Un espectro tan poderoso que ni cien pintores podrán detenerlo. Necesitas algo más que un lienzo. Necesitas un dragón.</text:span></text:p>
      <text:p text:style-name="Text_20_body"><text:span text:style-name="Emphasis">Xiān sintió un escalofrío. Los dragones eran las creaciones más poderosas del Lost Canvas, pero también las más costosas. La última vez que un pintor había intentado crear uno, había muerto en el acto, su cuerpo consumido por la tinta antes de que la criatura siquiera abriera los ojos.</text:span></text:p>
      <text:p text:style-name="P30"><text:span text:style-name="Emphasis">Xiān: ¿Cuánto costaría?</text:span></text:p>
      <text:p text:style-name="P30"><text:span text:style-name="Emphasis">Xi Dianxing: Décadas. Quizás toda tu vida. Pero si no lo haces, todos morirán. La elección es tuya, como siempre lo fue.</text:span></text:p>
      <text:p text:style-name="Text_20_body"><text:span text:style-name="Emphasis">La voz se desvaneció. Xiān se quedó solo en la oscuridad, con el pincel temblando en sus manos y el peso de una decisión imposible sobre sus hombros.</text:span></text:p>
      <text:p text:style-name="Text_20_body"><text:span text:style-name="Emphasis">A la mañana siguiente, reunió a Aelinor y a Souma. Les explicó lo que había escuchado. Aelinor palideció. Souma asintió lentamente, como si siempre hubiera sabido que este momento llegaría.</text:span></text:p>
      <text:p text:style-name="P30"><text:span text:style-name="Emphasis">Aelinor: No. No voy a permitirlo. Hay otra forma. Tiene que haber otra forma.</text:span></text:p>
      <text:p text:style-name="P30"><text:span text:style-name="Emphasis">Xiān: No la hay. Mi padre lo sabía. Por eso me dejó el pincel. Por eso me guió hasta aquí. Todo ha llevado a este momento.</text:span></text:p>
      <text:p text:style-name="P30"><text:span text:style-name="Emphasis">Souma: El costo es terrible, Xiān. Pero también lo es la alternativa. Si el general de la Sombra llega y no hay nada que lo detenga, el caos consumirá todo lo que conocemos.</text:span></text:p>
      <text:p text:style-name="Text_20_body"><text:span text:style-name="Emphasis">Xiān cerró los ojos. Pensó en el jardín de los Suspiros. En la promesa que le había hecho a Aelinor. En el ciruelo que florecía en invierno.</text:span></text:p>
      <text:p text:style-name="P30"><text:span text:style-name="Emphasis">Xiān: Lo haré. Pero no ahora. Necesito tres días para prepararme. Tres días para... para despedirme.</text:span></text:p>
      <text:p text:style-name="Text_20_body"><text:span text:style-name="Emphasis">Aelinor quiso protestar, pero algo en los ojos de Xiān la detuvo. No era resignación. Era determinación. La misma determinación que había visto en los ojos del Pintor Supremo cuando se sacrificó para sellar a la Sombra.</text:span></text:p>
      <text:p text:style-name="Text_20_body"><text:span text:style-name="Emphasis">Los tres días pasaron como un suspiro. Xiān los dedicó a preparar el lienzo más grande que jamás se había visto en el Palacio de Papier: un rollo de seda que se extendía cien metros, desde la torre del homenaje hasta el patio central. Los otros pintores lo ayudaron, aunque no sabían qué estaban creando. Solo sabían que Xiān lo necesitaba.</text:span></text:p>
      <text:p text:style-name="Text_20_body"><text:span text:style-name="Emphasis">Al tercer día, cuando el sol se puso, Xiān comenzó a pintar.</text:span></text:p>
      <text:p text:style-name="Text_20_body"><text:span text:style-name="Emphasis">Usó todos los colores. Usó la tinta de su propia sangre. Usó el pollo de estrellas que había recolectado del jardín de los Suspiros. Usó lágrimas, sudor, y algo más: el amor que sentía por Aelinor, el respeto que sentía por Souma, la gratitud que sentía por la vida que había recibido.</text:span></text:p>
      <text:p text:style-name="Text_20_body"><text:span text:style-name="Emphasis">Y del lienzo emergió un dragón.</text:span></text:p>
      <text:p text:style-name="Text_20_body"><text:span text:style-name="Emphasis">No era un dragón de fuego ni de oscuridad. Era un dragón de luz, con escamas que brillaban como mil soles y ojos que contenían la sabiduría de todas las eras. Sus alas se extendieron sobre el Palacio de Papier, y los que las vieron sintieron que el mundo entero se volvía a llenar de color.</text:span></text:p>
      <text:p text:style-name="Text_20_body"><text:span text:style-name="Emphasis">Xiān cayó de rodillas. El dragón rugió — un sonido que no era sonido, sino pura belleza hecha vibración — y se lanzó al cielo, donde comenzó a patrullar como un guardián eterno.</text:span></text:p>
      <text:p text:style-name="Text_20_body"><text:span text:style-name="Emphasis">Hab&amp;iacido creado. Pero el precio... el precio apenas comenzaba a cobrarse.</text:span></text:p>
      <text:p text:style-name="P18"><text:span text:style-name="Emphasis">✦ ✦ ✦</text:span></text:p>
      <text:p text:style-name="P19"><text:span text:style-name="Emphasis"><text:span text:style-name="T3">Capítulo XXIII </text:span></text:span></text:p>
      <text:h text:style-name="P8" text:outline-level="2"><text:span text:style-name="Emphasis"><text:span text:style-name="T3">El Precio de la Tinta</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oft-page-break/><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Cuando Xiān despertó, no reconoció el rostro que lo miraba desde el espejo. Las canas, que antes eran un hilo disperso, cubrían ahora la mitad de su cabello. Su rostro, antes joven y lleno de determinación, estaba surcado por arrugas profundas. Sus manos temblaban, y cuando intentó levantar el pincel, apenas podía sostenerlo.</text:span></text:p>
      <text:p text:style-name="Text_20_body"><text:span text:style-name="Emphasis">Había envejecido veinte años en una noche.</text:span></text:p>
      <text:p text:style-name="Text_20_body"><text:span text:style-name="Emphasis">Aelinor lo encontró en el suelo de su habitaci&amp;nacute;n, incapaz de moverse. Lo cargó en brazos como si fuera un niño, y Xiān se dio cuenta de que ella podía hacerlo: él pesaba ahora como un manojo de ramas secas.</text:span></text:p>
      <text:p text:style-name="P30"><text:span text:style-name="Emphasis">Aelinor: ¡Estás vivo! ¡Maldita sea, Xiān, estás vivo!</text:span></text:p>
      <text:p text:style-name="P30"><text:span text:style-name="Emphasis">Xiān: Aelinor... no puedo... sentir mis piernas...</text:span></text:p>
      <text:p text:style-name="Text_20_body"><text:span text:style-name="Emphasis">Ella lo llevó a la enfermería del Palacio, donde los médicos lo examinaron con rostros sombríos. El diagnóstico era claro: había consumido décadas de vida en la creación del dragón. Su cuerpo era ahora el de un hombre de sesenta años, y seguía deteriorándose.</text:span></text:p>
      <text:p text:style-name="P30"><text:span text:style-name="Emphasis">Médico: Si intenta pintar de nuevo, morirá. Su cuerpo no resiste otra creación. Ni siquiera un trazo pequeño.</text:span></text:p>
      <text:p text:style-name="Text_20_body"><text:span text:style-name="Emphasis">Pero Xiān no escuchaba. Miraba por la ventana hacia el cielo, donde el dragón de luz seguía patrullando, y una sonrisa se dibujaba en su rostro envejecido.</text:span></text:p>
      <text:p text:style-name="P30"><text:span text:style-name="Emphasis">Xiān: Valió la pena. Cada arruga, cada cana, cada segundo que me queda. Valió la pena.</text:span></text:p>
      <text:p text:style-name="Text_20_body"><text:span text:style-name="Emphasis">Aelinor no pudo contener las lágrimas. Se sentó a su lado y tomó sus manos temblorosas entre las suyas.</text:span></text:p>
      <text:p text:style-name="P30"><text:span text:style-name="Emphasis">Aelinor: No volverás a pintar. No te lo permitiré. Si el mundo necesita salvarse, que busque otro camino. No te perderé, Xiān. No después de todo.</text:span></text:p>
      <text:p text:style-name="P30"><text:span text:style-name="Emphasis">Xiān: El mundo no tiene otro camino. Pero tú... tú eres mi camino. Eres la razón por la que pinto. No para salvar el mundo, sino para merecerte.</text:span></text:p>
      <text:p text:style-name="Text_20_body"><text:span text:style-name="Emphasis">Ella lloró con una intensidad que no había mostrado nunca. La guerrera que había enfrentado ejércitos sin temblar, la noble que había cargado con la vergüenza de su linaje sin quebrarse, se desmoronó ante el hombre que amaba mientras se consumía ante sus ojos.</text:span></text:p>
      <text:p text:style-name="Text_20_body"><text:span text:style-name="Emphasis">Los días siguientes, Aelinor no se separó de su lado. Le leía libros de poesía de Senda. Le contaba historias de su infancia. Le cantaba canciones que su madre le había enseñado. Y cuando Xiān dormía, ella velaba su sueño con la mano sobre su corazón, asegurándose de que seguía latiendo.</text:span></text:p>
      <text:p text:style-name="Text_20_body"><text:span text:style-name="Emphasis">Souma los visitó una tarde. Se sentó en silencio durante una hora, observando al pintor envejecido y a la guerrera que lo cuidaba. Finalmente, habló:</text:span></text:p>
      <text:p text:style-name="P30"><text:span text:style-name="Emphasis">Souma: El dragón se mantiene estable. Los espectros no se atreven a acercarse al Palacio mientras él esté en el cielo. Has ganado tiempo, Xiān. Tiempo precioso.</text:span></text:p>
      <text:p text:style-name="P30"><text:span text:style-name="Emphasis">Xiān: ¿Tiempo para qué?</text:span></text:p>
      <text:p text:style-name="P30"><text:span text:style-name="Emphasis">Souma: Para encontrar otra forma. La profecía dice que el último pintor morirá pintando. Pero no dice que tiene que ser hoy. Ni mañana. A veces, la mayor victoria es un día más de vida.</text:span></text:p>
      <text:p text:style-name="Text_20_body"><text:span text:style-name="Emphasis">Xiān asintió lentamente. Y por primera vez desde que creó al dragón, sintió algo que no era determinació ni resignación: esperanza.</text:span></text:p>
      <text:p text:style-name="Text_20_body"><text:span text:style-name="Emphasis">Esa noche, Aelinor lo ayudó a salir al jard&amp;inacute;n de los Suspiros. El sauce llorón seguía allí, y el agua del estanque reflejaba las estrellas. Xiān se sentó bajo el árbol, y Aelinor se sentó a su lado, como aquella primera vez.</text:span></text:p>
      <text:p text:style-name="P30"><text:span text:style-name="Emphasis">Xiān: Si no puedo pintar... entonces tú pintarás por m´. Cuando llegue el momento. Tú eres la última de los Señores del Crepúsculo, y tu linaje tiene el poder. Yo te enseñaré todo lo que sé.</text:span></text:p>
      <text:p text:style-name="P30"><text:span text:style-name="Emphasis">Aelinor: No dejaré que llegue ese momento.</text:span></text:p>
      <text:p text:style-name="P30"><text:span text:style-name="Emphasis">Xiān: Prométeme que lo harás. Prométeme que no dejarás que el mundo se consuma por salvarme.</text:span></text:p>
      <text:p text:style-name="Text_20_body"><text:span text:style-name="Emphasis">Ella no respondió. No podía. Pero apretó su mano con fuerza, y eso fue suficiente.</text:span></text:p>
      <text:p text:style-name="P18"><text:span text:style-name="Emphasis">✦ ✦ ✦</text:span></text:p>
      <text:p text:style-name="P19"><text:span text:style-name="Emphasis"><text:span text:style-name="T3">Capítulo XXIV </text:span></text:span></text:p>
      <text:h text:style-name="P8" text:outline-level="2"><text:span text:style-name="Emphasis"><text:span text:style-name="T3">La Revelación del Lienzo</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oft-page-break/><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Fue la Maestra Su quien reveló la verdad. La anciana de ojos blancos convocó a Xiān, Aelinor y Souma a la cripta más profunda del Palacio de Papier, un lugar donde ni siquiera los Maestros entraban sin permiso. Allí, en un pedestal de obsidiana, descansaba el Lost Canvas original: el cuadro que el Pintor Supremo Xi Dianxing había pintado con su propia alma.</text:span></text:p>
      <text:p text:style-name="Text_20_body"><text:span text:style-name="Emphasis">Pero no era un cuadro. Era un espejo.</text:span></text:p>
      <text:p text:style-name="P30"><text:span text:style-name="Emphasis">Xiān: ¿Un espejo? Mi padre... pintó un espejo?</text:span></text:p>
      <text:p text:style-name="P30"><text:span text:style-name="Emphasis">Maestra Su: No lo pintó, Xiān. Lo arrancó. El Lost Canvas no es una creación: es un fragmento. Un fragmento del Lienzo Primordial, el tejido mismo de la realidad. Tu padre no inventó el poder del Lost Canvas. Lo descubrió. Y cuando descubrió que la Sombra era una rasgadura en ese tejido, usó el fragmento para sellarla.</text:span></text:p>
      <text:p text:style-name="Text_20_body"><text:span text:style-name="Emphasis">Las palabras cayeron como piedras en un estanque. Aelinor dio un paso atrás, incapaz de procesar lo que escuchaba. Souma cerró los ojos, como si finalmente comprendiera un misterio que había perseguido durante siglos.</text:span></text:p>
      <text:p text:style-name="P30"><text:span text:style-name="Emphasis">Aelinor: ¿El Lienzo Primordial? Eso es... eso es un mito. Una leyenda que los pintores cuentan a los niños.</text:span></text:p>
      <text:p text:style-name="P30"><text:span text:style-name="Emphasis">Maestra Su: Todo mito tiene una semilla de verdad. El Lienzo Primordial existe. Es el lugar donde la realidad fue pintada por primera vez, donde el primer artista — llámese como se llame — creó el mundo con un pincel de luz. Y la Sombra... la Sombra es el área del Lienzo que se corrompió. El lugar donde la tinta se volvió negra y la luz dejó de existir.</text:span></text:p>
      <text:p text:style-name="Text_20_body"><text:span text:style-name="Emphasis">Xiān miró el espejo. En su superficie no vio su reflejo, sino algo más: un paisaje de tinta y luz, donde montañas de color se alzaban sobre ríos de oro, y un cielo de mil tonos se extendíaba hasta el infinito. El Lienzo Primordial. El origen de todo.</text:span></text:p>
      <text:p text:style-name="P30"><text:span text:style-name="Emphasis">Xiān: Si la Sombra es una corrupción del Lienzo... entonces no puede ser destruida. Solo puede ser... restaurada.</text:span></text:p>
      <text:p text:style-name="P30"><text:span text:style-name="Emphasis">Maestra Su: Exacto. Y eso es lo que tu padre intentó hacer. No sellar a la Sombra para siempre — eso era imposible — sino mantenerla contenida mientras encontraba la forma de restaurar el Lienzo. Pero murió antes de completar su obra. Y ahora, el sello se desmorona.</text:span></text:p>
      <text:p text:style-name="P30"><text:span text:style-name="Emphasis">Souma: ¿Y cómo se restaura el Lienzo Primordial?</text:span></text:p>
      <text:p text:style-name="Text_20_body"><text:span text:style-name="Emphasis">La Maestra Su miró a Xiān con sus ojos blancos, y en ellos había algo que no era tristeza ni esperanza, sino una certeza antigua y terrible.</text:span></text:p>
      <text:p text:style-name="P30"><text:span text:style-name="Emphasis">Maestra Su: Alguien debe entrar en el Lienzo. Debe viajar al lugar donde la realidad fue pintada y restaurar la zona corrompida. Pero quien entra... no puede salir. El Lienzo se cierra detrás de él, y se convierte en parte del tejido. En parte de la realidad misma.</text:span></text:p>
      <text:p text:style-name="Text_20_body"><text:span text:style-name="Emphasis">El silencio fue absoluto. Xiān entendió lo que la Maestra Su no estaba diciendo: la profecía no hablaba de morir pintando. Hablaba de morir convirtiéndose en pintura. De convertirse en parte del Lienzo Primordial para siempre.</text:span></text:p>
      <text:p text:style-name="P30"><text:span text:style-name="Emphasis">Xiān: Mi padre no murió para sellar la Sombra. Murió intentando entrar en el Lienzo. Y falló.</text:span></text:p>
      <text:p text:style-name="P30"><text:span text:style-name="Emphasis">Maestra Su: No falló. Dejó el camino abierto. El sello que creó no es una pared: es una puerta. Una puerta que solo su sangre puede abrir. Tu sangre, Xiān. Tú eres la llave.</text:span></text:p>
      <text:p text:style-name="Text_20_body"><text:span text:style-name="Emphasis">Aelinor se levantó de golpe.</text:span></text:p>
      <text:p text:style-name="P30"><text:span text:style-name="Emphasis">Aelinor: ¡No! ¡No permitiré que se sacrifique! ¿No han entendido nada? ¿No ven lo que ya ha dado? ¡Ha dado su juventud, su fuerza, su vida! ¿Cuánto más debe perder?</text:span></text:p>
      <text:p text:style-name="P30"><text:span text:style-name="Emphasis">Xiān: Aelinor...</text:span></text:p>
      <text:p text:style-name="P30"><text:span text:style-name="Emphasis">Aelinor: No. Si alguien debe entrar en ese Lienzo, seré yo. Mi linaje tiene el poder. Mi sangre tiene la tinta. Yo soy la última de los Señores del Crepúsculo, y es mi responsabilidad restaurar lo que mi familia dañó.</text:span></text:p>
      <text:p text:style-name="P30"><text:span text:style-name="Emphasis">Maestra Su: Tu sangre tiene poder, sí. Pero no la llave. La puerta solo responde al linaje del Pintor Supremo. Si tú intentas entrar, el Lienzo te rechazarás. Y la Sombra aprovechará la oportunidad para romper el sello desde dentro.</text:span></text:p>
      <text:p text:style-name="Text_20_body"><text:span text:style-name="Emphasis">Aelinor golpeó la pared con el puño. La sangre corrió por sus nudillos, pero no sintió dolor. Solo rabia. Solo impotencia.</text:span></text:p>
      <text:p text:style-name="Text_20_body"><text:span text:style-name="Emphasis">Xiān se levantó de su silla de ruedas — porque ahora necesitaba una silla de ruedas — y caminó hacia ella. Cada paso era un esfuerzo, cada respiración un milagro. Pero llegó hasta ella y la tomó de las manos.</text:span></text:p>
      <text:p text:style-name="P30"><text:span text:style-name="Emphasis">Xiān: Escúchame. Si entro en el Lienzo, no muero. Me convierto en parte de algo más grande. En parte del tejido que sostiene el mundo. Y desde dentro, podré restaurar la zona corrompida. Podré pintar de nuevo, Aelinor. Pero esta vez, pintaré con la luz misma de la realidad.</text:span></text:p>
      <text:p text:style-name="P30"><text:span text:style-name="Emphasis">Aelinor: Y yo te perderé.</text:span></text:p>
      <text:p text:style-name="P30"><text:span text:style-name="Emphasis">Xiān: No. Me tendrás en cada amanecer, en cada estrella, en cada pincelada que des. Porque yo seré el lienzo sobre el que pintas. Seré la tinta que usas. Seré la luz que te guía.</text:span></text:p>
      <text:p text:style-name="Text_20_body"><text:span text:style-name="Emphasis">Ella cayó de rodillas, y él cayó con ella. Se abrazaron en el suelo de la cripta, rodeados de secretos antiguos y verdades imposibles, y lloraron juntos por última vez.</text:span></text:p>
      <text:p text:style-name="Text_20_body"><text:span text:style-name="Emphasis">Souma se acercó y puso una mano sobre los hombros de Xiān.</text:span></text:p>
      <text:p text:style-name="P30"><text:span text:style-name="Emphasis">Souma: El camino al Lienzo Primordial pasa por el Abismo. Por el lugar donde tu padre murió intentando abrir la puerta. Debes ir allí con los setenta pintores que quedan. Debes abrir la puerta y entrar antes de que la Sombra se entere.</text:span></text:p>
      <text:p text:style-name="P30"><text:span text:style-name="Emphasis">Xiān: ¿Y el dragón?</text:span></text:p>
      <text:p text:style-name="P30"><text:span text:style-name="Emphasis">Souma: El dragón te protegerá en el camino. Pero una vez que cruces el Umbral... el dragón no podrá seguirte. El Lienzo Primordial es el lugar donde todas las creaciones dejan de existir. Incluyendo las tuyas.</text:span></text:p>
      <text:p text:style-name="Text_20_body"><text:span text:style-name="Emphasis">Xiān asintió. Se puso de pie con la ayuda de Aelinor, y juntos salieron de la cripta. Arriba, en el Palacio de Papier, los setenta pintores que quedaban los esperaban. No sabían todo lo que se había revelado, pero sabían que el momento de la batalla final había llegado.</text:span></text:p>
      <text:p text:style-name="Text_20_body"><text:span text:style-name="Emphasis">Xiān los miró — a los pintores, a Souma, a Aelinor — y por un instante, su rostro envejecido brilló con la misma luz que había visto en los ojos de su padre.</text:span></text:p>
      <text:p text:style-name="P30"><text:span text:style-name="Emphasis">Xiān: Mañana marchamos al Abismo. No para luchar, sino para restaurar. No para destruir, sino para crear. El Lost Canvas nos dio el poder de hacer realidad nuestros sueños. Y mi último sueño es un mundo donde la Sombra no exista. Donde la luz vuelva a pintar los cielos. Donde todos podamos vivir en paz.</text:span></text:p>
      <text:p text:style-name="Text_20_body"><text:span text:style-name="Emphasis">Y así, bajo la luz del dragón que patrullaba los cielos, el último pintor comenzó a prepararse para su obra final. No sería un cuadro de guerra ni de destrucción. Sería un cuadro de restauración. De renacimiento. De esperanza.</text:span></text:p>
      <text:p text:style-name="Text_20_body"><text:span text:style-name="Emphasis">El Volumen II de las Crónicas de Xiān y Aelinor termina aquí. El Volumen III — El Lienzo Primordial — narrará su viaje al Abismo, la apertura de la puerta, y la batalla final dentro del tejido mismo de la realidad.</text:span></text:p>
      <text:p text:style-name="P19"><text:span text:style-name="Emphasis"><text:span text:style-name="T3">Capítulo X </text:span></text:span></text:p>
      <text:h text:style-name="P8" text:outline-level="2"><text:span text:style-name="Emphasis"><text:span text:style-name="T3">Las Sombras del Consejo</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El Palacio de Papier tenía un consejo: doce pintores ancianos que decidían quién podía estudiar, quién debía partir, y quién era demasiado peligroso para vivir. Xiān nunca les había prestado atención — hasta que le citaron.</text:span></text:p>
      <text:p text:style-name="Text_20_body"><text:span text:style-name="Emphasis">La sala del consejo era circular, con frescos en el techo que representaban la historia de los Lost Canvas. Xiān miró hacia arriba y vio a su padre pintando el sello del abismo. El fresco era tan detallado que parecía moverse.</text:span></text:p>
      <text:p text:style-name="P30"><text:span text:style-name="Emphasis">Maestro Zhong: Xiān, hijo de Dianxing. Tu poder preocupa al consejo. Hay quienes dicen que deberías ser encerrado antes de que la Sombra te use como llave.</text:span></text:p>
      <text:p text:style-name="P30"><text:span text:style-name="Emphasis">Xiān: ¿Encerrado? ¿Por qué? No he hecho nada malo.</text:span></text:p>
      <text:p text:style-name="P30"><text:span text:style-name="Emphasis">Maestra Lin: No aún. Pero tu padre también era inocente antes de vender su alma por poder. La sangre del pintor lleva la maldición. Todos lo sabemos.</text:span></text:p>
      <text:p text:style-name="Text_20_body"><text:span text:style-name="Emphasis">Xiān apretó los puños. Aelinor, de pie junto a él, dio un paso adelante.</text:span></text:p>
      <text:p text:style-name="P30"><text:span text:style-name="Emphasis">Aelinor: Mi padre también fue un pintor del Lost Canvas. ¿Sugieren que yo también soy una amenaza?</text:span></text:p>
      <text:p text:style-name="Text_20_body"><text:span text:style-name="Emphasis">El consejo murmuró. Aelinor era noble, respetada, la heroína de la última guerra contra los Espectros. Cuestionarla era arriesgado.</text:span></text:p>
      <text:p text:style-name="P30"><text:span text:style-name="Emphasis">Maestro Zhong: No sugerimos nada, señorita Aelinor. Pero el consejo votará. Si Xiān debe ser encerrado, así será.</text:span></text:p>
      <text:p text:style-name="Text_20_body"><text:span text:style-name="Emphasis">Souma se levantó. Su armadura de Libra crujió.</text:span></text:p>
      <text:p text:style-name="P30"><text:span text:style-name="Emphasis">Souma: El consejo no tiene autoridad sobre un Gold Saint. Xiān es mi protegido. Quien quiera encerrarlo, tendrá que pasar por mí.</text:span></text:p>
      <text:p text:style-name="Text_20_body"><text:span text:style-name="Emphasis">El silencio fue absoluto. Nadie desafiaba a un Gold Saint. La votación se canceló. Pero Xiān vio en los ojos de los consejeros algo que le heló la sangre: no era miedo. Era odio.</text:span></text:p>
      <text:p text:style-name="Text_20_body"><text:span text:style-name="Emphasis">Esa noche, alguien intentó envenenar su comida. Aelinor lo notó a tiempo — su brocha de guerra detectó la tinta negra disuelta en el té.</text:span></text:p>
      <text:p text:style-name="P30"><text:span text:style-name="Emphasis">Aelinor: El consejo no solo te quiere encerrado, Xiān. Te quiere muerto.</text:span></text:p>
      <text:p text:style-name="P19"><text:span text:style-name="Emphasis"><text:span text:style-name="T3">Capítulo XI </text:span></text:span></text:p>
      <text:h text:style-name="P8" text:outline-level="2"><text:soft-page-break/><text:span text:style-name="Emphasis"><text:span text:style-name="T3">El Jardín de los Lienzos</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Después del intento de envenenamiento, Aelinor llevó a Xiān al Jardín de los Lienzos, un lugar prohibido del Palacio donde los estudiantes pintaban sus emociones en flores que nunca se marchitaban.</text:span></text:p>
      <text:p text:style-name="Text_20_body"><text:span text:style-name="Emphasis">El jardín era un sueño. Rosas de tinta dorada, crisantemos de luz plateada, lirios de sangre que cantaban cuando el viento soplaba. Cada flor era un sentimiento hecho arte.</text:span></text:p>
      <text:p text:style-name="P30"><text:span text:style-name="Emphasis">Xiān: ¿Por qué me trajiste aquí?</text:span></text:p>
      <text:p text:style-name="P30"><text:span text:style-name="Emphasis">Aelinor: Porque necesitas recordar por qué pintas. No es por la Sombra. No es por el consejo. Es por esto.</text:span></text:p>
      <text:p text:style-name="Text_20_body"><text:span text:style-name="Emphasis">Señaló una flor azul, pequeña, escondida entre las demás. Era una flor simple, sin adornos, pero pintada con una delicadeza que hacía llorar.</text:span></text:p>
      <text:p text:style-name="P30"><text:span text:style-name="Emphasis">Aelinor: Esta la pinté yo. Tenía ocho años. Es mi madre. La pinté el día que murió. No es poderosa. No es un arma. Es solo... recuerdo.</text:span></text:p>
      <text:p text:style-name="Text_20_body"><text:span text:style-name="Emphasis">Xiān tocó la flor con los dedos. Y sintió el amor de Aelinor, su dolor, su esperanza. Era como leer un diario íntimo.</text:span></text:p>
      <text:p text:style-name="P30"><text:span text:style-name="Emphasis">Xiān: Es hermosa.</text:span></text:p>
      <text:p text:style-name="P30"><text:span text:style-name="Emphasis">Aelinor: Tú me enseñaste que pintar no es solo crear. Es conectar. Cuando me pintaste aquella noche, sentí que alguien me veía por primera vez. Ahora quiero hacer lo mismo por ti.</text:span></text:p>
      <text:p text:style-name="Text_20_body"><text:span text:style-name="Emphasis">Tomó el pincel de Xiān y lo guió hacia un lienzo en blanco. Juntos pintaron. No un guerrero, no un dragón. Pintaron el uno al otro — no como eran, como se veían mutuamente.</text:span></text:p>
      <text:p text:style-name="Text_20_body"><text:span text:style-name="Emphasis">Cuando terminaron, dos figuras de tinta se abrazaron sobre el lienzo. Y por primera vez desde que había llegado al Palacio, Xiān sonrió de verdad.</text:span></text:p>
      <text:p text:style-name="Text_20_body"><text:span text:style-name="Emphasis">Pero la paz duró poco. Un grito resonó en el jardín. Alguien había atacado el muro norte del Palacio.</text:span></text:p>
      <text:p text:style-name="P19"><text:span text:style-name="Emphasis"><text:span text:style-name="T3">Capítulo XII </text:span></text:span></text:p>
      <text:h text:style-name="P8" text:outline-level="2"><text:span text:style-name="Emphasis"><text:span text:style-name="T3">Los Tres Espectros</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oft-page-break/><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Tres Espectros atacaron simultáneamente: uno en el muro norte, otro en el sur, y el tercero apareció directamente en el patio central. Era un asesinato coordinado, diseñado para dividir a los defensores.</text:span></text:p>
      <text:p text:style-name="Text_20_body"><text:span text:style-name="Emphasis">Souma corrió hacia el muro norte. Aelinor hacia el sur. Y Xiān se quedó solo con el Espectro del patio.</text:span></text:p>
      <text:p text:style-name="Text_20_body"><text:span text:style-name="Emphasis">El Espectro era diferente. No tenía forma definida — era un charco de oscuridad que adoptaba las formas de las personas que absorbía. Primero tomó la forma de la madre de Xiān. Luego la de su padre. Finalmente, la de Aelinor.</text:span></text:p>
      <text:p text:style-name="P30"><text:span text:style-name="Emphasis">El Espectro (como Aelinor): Xiān... ayúdame. Tengo miedo.</text:span></text:p>
      <text:p text:style-name="Text_20_body"><text:span text:style-name="Emphasis">Xiān sabía que no era ella. Pero el dolor de ver su rostro era real. El Espectro se alimentaba del dolor.</text:span></text:p>
      <text:p text:style-name="P30"><text:span text:style-name="Emphasis">Xiān: No eres Aelinor. Pero gracias por recordarme por qué lucho.</text:span></text:p>
      <text:p text:style-name="Text_20_body"><text:span text:style-name="Emphasis">Pintó. No un arma. Pintó un espejo. Un lienzo que reflejaba la verdad. El Espectro gritó cuando vio su propio reflejo — la ausencia de todo, el vacío, la nada.</text:span></text:p>
      <text:p text:style-name="Text_20_body"><text:span text:style-name="Emphasis">El espejo se rompió. El Espectro se disolvió.</text:span></text:p>
      <text:p text:style-name="Text_20_body"><text:span text:style-name="Emphasis">En el muro norte, Souma derrotó al segundo Espectro con su Tenkyūha. En el sur, Aelinor destruyó al tercero con su corazón de tinta latiendo furiosamente.</text:span></text:p>
      <text:p text:style-name="Text_20_body"><text:span text:style-name="Emphasis">Pero el precio fue alto. Aelinor cayó de rodillas, tosiendo sangre. El corazón de tinta había consumido demasiado.</text:span></text:p>
      <text:p text:style-name="P30"><text:span text:style-name="Emphasis">Xiān: ¡Aelinor!</text:span></text:p>
      <text:p text:style-name="Text_20_body"><text:span text:style-name="Emphasis">Corrió hacia ella. La sostuvo en sus brazos. Y supo que cada batalla la acercaba más al final.</text:span></text:p>
      <text:p text:style-name="P19"><text:span text:style-name="Emphasis"><text:span text:style-name="T3">Capítulo XIII </text:span></text:span></text:p>
      <text:h text:style-name="P8" text:outline-level="2"><text:span text:style-name="Emphasis"><text:span text:style-name="T3">El Dragón de Jade</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Xiān necesitaba más poder. Los tres Espectros habían sido solo un aviso — la Sombra estaba probando las defensas. El ataque real vendría pronto, y él no era lo suficientemente fuerte.</text:span></text:p>
      <text:p text:style-name="Text_20_body"><text:span text:style-name="Emphasis">En la biblioteca prohibida, encontró un texto antiguo: la fórmula para pintar un dragón. No un dragón cualquiera — un dragón de jade, el guardián supremo del Lost Canvas. Pero el precio era terrible: el pintor debía entregar un recuerdo querido. Para siempre.</text:span></text:p>
      <text:p text:style-name="P30"><text:span text:style-name="Emphasis">Xiān: ¿Un recuerdo? ¿Cuál?</text:span></text:p>
      <text:p text:style-name="Text_20_body"><text:span text:style-name="Emphasis">El texto no lo decía. Simplemente decía: El dragón toma lo que más amas. Y tú nunca lo recuperarás.</text:span></text:p>
      <text:p text:style-name="Text_20_body"><text:span text:style-name="Emphasis">Xiān dudó. ¿Qué estaba dispuesto a perder? ¿El rostro de su madre? ¿La voz de su padre? ¿Los ojos de Aelinor?</text:span></text:p>
      <text:p text:style-name="Text_20_body"><text:span text:style-name="Emphasis">Pero entonces recordó las palabras de Souma: El poder sin sacrificio es ilusión.</text:span></text:p>
      <text:p text:style-name="Text_20_body"><text:span text:style-name="Emphasis">Comenzó a pintar. El dragón de jade brotó del lienzo con un rugido que hizo temblar el Palacio. Era inmenso, hermoso, terrible. Y cuando terminó, Xiān sintió que algo se vaciaba dentro de él.</text:span></text:p>
      <text:p text:style-name="Text_20_body"><text:span text:style-name="Emphasis">Había perdido el recuerdo de su primera infancia. No recordaba quién lo había criado antes de su padre. No recordaba su primer día en Senda. No recordaba... nada antes de los seis años.</text:span></text:p>
      <text:p text:style-name="P30"><text:span text:style-name="Emphasis">Aelinor: Xiān, ¿estás bien?</text:span></text:p>
      <text:p text:style-name="P30"><text:span text:style-name="Emphasis">Xiān: ...sí. Creo que sí. Pero hay algo... falta algo. No sé qué.</text:span></text:p>
      <text:p text:style-name="Text_20_body"><text:span text:style-name="Emphasis">Aelinor lo abrazó. Y en sus brazos, Xiān sintió que aunque había perdido parte de sí mismo, al menos no estaba solo.</text:span></text:p>
      <text:p text:style-name="P19"><text:span text:style-name="Emphasis"><text:span text:style-name="T3">Capítulo XIV </text:span></text:span></text:p>
      <text:h text:style-name="P8" text:outline-level="2"><text:span text:style-name="Emphasis"><text:span text:style-name="T3">El Precio de la Tinta</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oft-page-break/><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Xiān se miró en el espejo. Tenía diecisiete años, pero su rostro era el de un hombre de cuarenta. Las sienes plateadas, las arrugas alrededor de los ojos, las manos temblorosas. El Lost Canvas lo estaba consumiendo.</text:span></text:p>
      <text:p text:style-name="Text_20_body"><text:span text:style-name="Emphasis">Aelinor lo encontró frente al espejo. No dijo nada. Solo se puso de pie junto a él y le mostró su propio reflejo: ella también había envejecido. No tanto como él, pero las líneas de expresión se habían profundizado, y su pelo tenía mechones blancos.</text:span></text:p>
      <text:p text:style-name="P30"><text:span text:style-name="Emphasis">Aelinor: Los dos nos estamos muriendo.</text:span></text:p>
      <text:p text:style-name="P30"><text:span text:style-name="Emphasis">Xiān: ¿Vale la pena?</text:span></text:p>
      <text:p text:style-name="P30"><text:span text:style-name="Emphasis">Aelinor: Si logramos sellar a la Sombra... sí. Mil años de paz a cambio de nuestras vidas. Es un buen trato.</text:span></text:p>
      <text:p text:style-name="P30"><text:span text:style-name="Emphasis">Xiān: Yo no quiero un buen trato. Quiero vivir. Quiero envejecerte contigo, no morir antes de que puedas canas.</text:span></text:p>
      <text:p text:style-name="Text_20_body"><text:span text:style-name="Emphasis">Aelinor lo besó. Fue un beso breve, seco, con sabor a tinta y a lágrimas.</text:span></text:p>
      <text:p text:style-name="P30"><text:span text:style-name="Emphasis">Aelinor: Entonces pintemos un mundo donde eso sea posible.</text:span></text:p>
      <text:p text:style-name="Text_20_body"><text:span text:style-name="Emphasis">Esa noche, Xiān pintó un jardín. Un jardín donde dos figuras caminaban de la mano, viejas, arrugadas, vivas. No sabía si era un deseo o una profecía. Pero cuando terminó, la pintura brilló con una luz que no había visto antes.</text:span></text:p>
      <text:p text:style-name="P19"><text:span text:style-name="Emphasis"><text:span text:style-name="T3">Capítulo XV </text:span></text:span></text:p>
      <text:h text:style-name="P8" text:outline-level="2"><text:span text:style-name="Emphasis"><text:span text:style-name="T3">El Origen del Canvas</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oft-page-break/><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Text_20_body"><text:span text:style-name="Emphasis">Souma reveló la verdad la noche antes de la marcha al Abismo. Reunió a Xiān y a Aelinor en la cripta donde descansaba el sello de su padre.</text:span></text:p>
      <text:p text:style-name="P30"><text:span text:style-name="Emphasis">Souma: El Lost Canvas no es una maldición. Es un regalo. En el principio, solo había oscuridad. No había luz, no había color, no había vida. Entonces, el Primer Pintor — el primer ser con voluntad — pintó un rayo de luz sobre el lienzo del vacío. Y la luz separó las tinieblas. La Sombra es esa oscuridad original, y quiere volver a unirlo todo. Quiere borrar el lienzo.</text:span></text:p>
      <text:p text:style-name="P30"><text:span text:style-name="Emphasis">Xiān: ¿Y el Lost Canvas?</text:span></text:p>
      <text:p text:style-name="P30"><text:span text:style-name="Emphasis">Souma: Es el poder del Primer Pintor, transmitido a través de la sangre. Cada pintor del Lost Canvas lleva una chispa de ese poder original. Y tú, Xiān, eres el más fuerte porque tu padre selló a la Sombra con la suya. Tienes dos chispas: la tuya y la de tu padre.</text:span></text:p>
      <text:p text:style-name="P30"><text:span text:style-name="Emphasis">Aelinor: ¿Y yo? ¿Yo también tengo esa chispa?</text:span></text:p>
      <text:p text:style-name="P30"><text:span text:style-name="Emphasis">Souma: Sí. Pero la usaste diferente. Tu corazón de tinta es la chispa convertida en arma. Cuando el corazón deje de latir, tu chispa pasará a Xiān. Y entonces él tendrá tres chispas: la suya, la de su padre, y la tuya.</text:span></text:p>
      <text:p text:style-name="Text_20_body"><text:span text:style-name="Emphasis">El silencio fue absoluto. Aelinor miró a Xiān. Y en sus ojos, había aceptación.</text:span></text:p>
      <text:p text:style-name="P30"><text:span text:style-name="Emphasis">Aelinor: Entonces tendré que morir para que él pueda vivir.</text:span></text:p>
      <text:p text:style-name="P30"><text:span text:style-name="Emphasis">Souma: No necesariamente. Hay otra forma. Pero requiere que Xiān pinte el Lost Canvas definitivo: el Lienzo Primordial. El mismo lienzo que el Primer Pintor usó para crear la luz. Si lo pinta, la Sombra será destruida para siempre. Pero el precio...</text:span></text:p>
      <text:p text:style-name="P30"><text:span text:style-name="Emphasis">Xiān: El precio es mi vida. Lo sé. Lo acepto.</text:span></text:p>
      <text:p text:style-name="P30"><text:span text:style-name="Emphasis">Aelinor: ¡No! ¡No lo acepto! ¡Tiene que haber otra forma!</text:span></text:p>
      <text:p text:style-name="Text_20_body"><text:span text:style-name="Emphasis">Pero Xiān la tomó de la mano. Y con los ojos viejos y cansados, sonrió.</text:span></text:p>
      <text:p text:style-name="P30"><text:span text:style-name="Emphasis">Xiān: Un jardín contigo, aunque sea un momento en un lienzo... vale más que una vida entera sin ti.</text:span></text:p>
      <text:p text:style-name="P5"><text:span text:style-name="Emphasis"><text:span text:style-name="T4">VOLUMEN III</text:span></text:span></text:p>
      <text:h text:style-name="P9" text:outline-level="2"><text:span text:style-name="Emphasis"><text:span text:style-name="T4">El Lienzo Primordial</text:span></text:span></text:h>
      <text:p text:style-name="P16"><text:span text:style-name="Emphasis">✦ ✦ ✦</text:span></text:p>
      <text:p text:style-name="P4"><text:span text:style-name="Emphasis">VOLUMEN III</text:span></text:p>
      <text:h text:style-name="P7" text:outline-level="2"><text:span text:style-name="Emphasis">El Lienzo Final</text:span></text:h>
      <text:h text:style-name="P12" text:outline-level="3"><text:span text:style-name="Emphasis">Crónicas de Xiān y Aelinor</text:span></text:h>
      <text:p text:style-name="P16"><text:span text:style-name="Emphasis">✦ ✦ ✦</text:span></text:p>
      <text:p text:style-name="P17"><text:span text:style-name="Emphasis">«Esta es la última página.<text:line-break/>Lo que pintes aquí será eterno.<text:line-break/>O el último trazo que hagas.«</text:span></text:p>
      <text:h text:style-name="Heading_20_2" text:outline-level="2"><text:span text:style-name="Emphasis">Indice</text:span></text:h>
      <text:p text:style-name="Text_20_body"><text:span text:style-name="Emphasis">El Abismo</text:span></text:p>
      <text:list text:style-name="L5">
        <text:list-item>
          <text:p text:style-name="P32"><text:span text:style-name="Emphasis">19. El Corazón de la Sombra </text:span></text:p>
        </text:list-item>
        <text:list-item>
          <text:p text:style-name="P31"><text:span text:style-name="Emphasis">20. El Pincel contra la Oscuridad </text:span></text:p>
        </text:list-item>
      </text:list>
      <text:p text:style-name="Text_20_body"><text:span text:style-name="Emphasis">El Sacrificio</text:span></text:p>
      <text:list text:style-name="L6">
        <text:list-item>
          <text:p text:style-name="P34"><text:span text:style-name="Emphasis">21. El Sacrificio de Aelinor </text:span></text:p>
        </text:list-item>
        <text:list-item>
          <text:p text:style-name="P33"><text:span text:style-name="Emphasis">22. El Lienzo Final </text:span></text:p>
        </text:list-item>
      </text:list>
      <text:p text:style-name="Text_20_body"><text:span text:style-name="Emphasis">El Amanecer</text:span></text:p>
      <text:list text:style-name="L7">
        <text:list-item>
          <text:p text:style-name="P36"><text:span text:style-name="Emphasis">23. El Precio del Destino </text:span></text:p>
        </text:list-item>
        <text:list-item>
          <text:p text:style-name="P36"><text:span text:style-name="Emphasis">24. El Amanecer Restaurado </text:span></text:p>
        </text:list-item>
        <text:list-item>
          <text:p text:style-name="P36"><text:span text:style-name="Emphasis">25. El Último Retrato </text:span></text:p>
        </text:list-item>
        <text:list-item>
          <text:p text:style-name="P35"><text:span text:style-name="Emphasis">26. Epílogo: El Lienzo Eterno </text:span></text:p>
        </text:list-item>
      </text:list>
      <text:p text:style-name="P19"><text:span text:style-name="Emphasis"><text:span text:style-name="T3">Capítulo XIX </text:span></text:span></text:p>
      <text:h text:style-name="P8" text:outline-level="2"><text:span text:style-name="Emphasis"><text:span text:style-name="T3">El Corazón de la Sombra</text:span></text:span></text:h>
      <text:p text:style-name="P2"><text:span text:style-name="Emphasis">»Donde no hay luz, hay forma.<text:line-break/>Donde no hay forma, hay miedo.<text:line-break/>El Perdido es todo eso<text:line-break/>y nada al mismo tiemp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Xiān cerró los ojos y dejó que el silencio lo envolviera. En esos momentos de quietud, podía sentir el latido del Canvas Perdido, ese poder antiguo que fluía por sus venas como tinta líquida. ¿Era un regalo o una maldición? Quizás ambas cosas. Quizás la diferencia no importara. Lo que importaba era el ahora, el trazo, la decisión de seguir pintando aunque el precio fuera su propia vida.</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se acercó a él, su presencia tan constante como la luz de las estrellas. No necesitaba palabras. Su sola presencia era suficiente para recordarle por qué luchaba. No por el mundo. No por la humanidad. Por ella. Por la posibilidad de un futuro donde ambos pudieran envejecer juntos, pintando cuadros que no costaran la vida.</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camino al abismo duró días. El invierno los atacaba, pero el frío no era el peor enemigo: era la oscuridad que crecía con cada paso. El aire se volvía pesado. Los pintores empezaron a ver bras entre los árboles, voces en viento.</text:span></text:p>
      <text:p text:style-name="P21"><text:span text:style-name="Emphasis">Llegaron al nido del Perdido: una cueva en la montaña más alta, cuya entrada era una pintura derruida de un cielo nocturno.</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Había mil espectros esperando pero no atacaron: abrieron cami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30"><text:span text:style-name="Emphasis">Un espectro: El Perdido ha estado esperando al último pintor durante trescientos años. Adelante.</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y Aelinor entraron solos.Los otros setenta pintores quedaron afuera.</text:span></text:p>
      <text:p text:style-name="P21"><text:span text:style-name="Emphasis">Dentro la oscuridad era casi física. En el centro, el Corazón de la Sombra: una espera de oscuridad flotante hecha de millones de almas.</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30"><text:span text:style-name="Emphasis">La Sombra: Has venido al final. Has venido a pintar tu muer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30"><text:span text:style-name="Emphasis">Xiān: He venido a terminar lo que empezó mi padre.</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3"><text:span text:style-name="Emphasis">»La palabra más poderosa no es luz o amor.<text:line-break/>Es basta.<text:line-break/>Y el pintor la susurra cuando ya no tiene vida pero todavía tiene pincel.»</text:span></text:p>
      <text:p text:style-name="P21"><text:span text:style-name="Emphasis">La batalla comenzó. Xiān lanzó todo: cada batalla pintada antes, cada recuerdo. Pero la Sombra era devoradora. Cada pintura era absorbida.</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30"><text:span text:style-name="Emphasis">La Sombra: No importa cuánto pintes. Todo lo que creas somos su creador, porque todo nace de la oscuridad.</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oft-page-break/><text:span text:style-name="Emphasis">Xiān cayó de rodillas. Sin vida que dar. Y oyó una voz:</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30"><text:span text:style-name="Emphasis">La voz de su padre: No te rindas. Yo no me rendí ni cuando me quitó todo. Tienes un pincel más fuerte que el mío.</text:span></text:p>
      <text:p text:style-name="P21"><text:span text:style-name="Emphasis">Xiān entendió: no era poder, era propósito.</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3"><text:span text:style-name="Emphasis">»El sacrificio no es morir.<text:line-break/>El sacrificio es dar lo que no tienes<text:line-break/>por alguien que no puede devolverte nada.»</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Cuando Xiān estaba a punto de ceder, Aelinor tomó el pincel de hues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30"><text:span text:style-name="Emphasis">Aelinor: Por favor, déjame ayudarte. Lo poco que me queda.</text:span></text:p>
      <text:p text:style-name="P30"><text:span text:style-name="Emphasis">Xiān: No... el precio es tu vid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30"><text:span text:style-name="Emphasis">Aelinor: Precisamente por eso. La vida no sirve si no la da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Se pintó a sí misma en el lienzo. Cada trazo de su vida fluyó hacia el pincel, hacia Xiān.</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Fue la última vez que la vio como persona. Y la primera que la vió como eternidad.</text:span></text:p>
      <text:p text:style-name="P3"><text:span text:style-name="Emphasis">»El cuadro más poderoso no es el que mata.<text:line-break/>Es el que da vida.<text:line-break/>Y el que da vida verdadera<text:line-break/>es el que se pinta con otr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Con la vida de Aelinor en el pincel, Xiān pintó el cuadro más grande: un mural que abarcaba todo el abismo. No pintó guerreros. Pintó a un muchacho en un puente, mirando al frente, con una muchacha a su lado.</text:span></text:p>
      <text:p text:style-name="P21"><text:span text:style-name="Emphasis">Eran él y Aelinor. Como podían haber sid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30"><text:span text:style-name="Emphasis">Xiān: Te estoy pintando un final diferente.</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muchacho del puente se levantó, caminó hacia el corazón de la Sombra y le tendió la man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La Sombra no podía negarse: el muchacho era luz pura. Y cuando sus manos se tocaron, la Sombra empezó a deshacerse.</text:span></text:p>
      <text:p text:style-name="P21"><text:span text:style-name="Emphasis">Millones de gritos: almas devueltas, espectros destruidos, oscuridad deshech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Xiān habíado toda su vida. Sintió sus recuerdos desvanecióndose. No recordaba Senda ni a su padre. Cuando miró a Aelinor todavía en el aire, sonrió y dijo:</text:span></text:p>
      <text:p text:style-name="P30"><text:span text:style-name="Emphasis">Xiān: Gracias... por todo.</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Y se deshizo en tint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a Sombra fue derrotada. Murieron diez mil pintores en la última batalla. Los sobrevivientes construyeron un santuario con el retrato inacabado de Xiān y la Maestra Su. Ahora es el Pintor del Amanecer.</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os pintores encontraron tras el corazón de la Sombra un último cuadro: Xiān y Aelinor juntos, pintados con la última gota del pincel de hueso. Están en el salón más alto del Palacio. En las noches claras, cuando la luna entra por las ventanas, todavía pueden verse caminar.</text:span></text:p>
      <text:p text:style-name="P21"><text:span text:style-name="Emphasis">Han pasado generaciones de pintores. Y todavía se recita en el Palacio este primer dí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3"><text:span text:style-name="Emphasis">«La pintura no es sólo tinta sobre tela.<text:line-break/>Es vida, es alma, es sacrificio.<text:line-break/>Y el mejor cuadro es el que se pinta<text:line-break/>con el corazón de quien ya no está.«</text:span></text:p>
      <text:p text:style-name="P21"><text:span text:style-name="Emphasis">Porque Xiān murió pintando. Y en el Lost Canvas, pintar con el alma es la única forma de ser eterno.</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Text_20_body"><text:span text:style-name="Emphasis">La Sombra no vino sola. Vino con un ejército. Cientos de Espectros emergieron del horizonte como una marea negra. No eran los servidores débiles que Xiān había enfrentado antes — eran los Guerreros de la Sombra, cada uno con el poder de un pintor perdido. Y al frente de todos, caminando con la calma de quien sabe que ya ha ganado, estaba Yami, el teniente.</text:span></text:p>
      <text:p text:style-name="Text_20_body"><text:span text:style-name="Emphasis">El Palacio de Papier se preparó. Souma organizó a los Gold Saints. Aelinor entrenó a los estudiantes. Xiān pintó defensas: muros de luz, púas de tinta dorada, trampas que atrapaban a los Espectros en bucles infinitos de color.</text:span></text:p>
      <text:p text:style-name="Text_20_body"><text:span text:style-name="Emphasis">Pero no fue suficiente. Los Espectros rompieron el primer muro en minutos. El segundo cayó al amanecer. Para el tercer día, solo quedaba la muralla interior.</text:span></text:p>
      <text:p text:style-name="P30"><text:span text:style-name="Emphasis">Souma: Xiān, tienes que comenzar el Lienzo Primordial. Ahora. Si terminamos las defensas, no habrá nada que nos proteja.</text:span></text:p>
      <text:p text:style-name="P30"><text:span text:style-name="Emphasis">Xiān: Necesito tiempo. El lienzo más grande que he pintado tomó días. Este... este es el más grande de todos.</text:span></text:p>
      <text:p text:style-name="P30"><text:span text:style-name="Emphasis">Aelinor: Yo te daré tiempo.</text:span></text:p>
      <text:p text:style-name="Text_20_body"><text:span text:style-name="Emphasis">Xiān la miró. Sabía lo que significaba. Dar tiempo significaba usar su corazón de tinta. Significaba acortar su vida.</text:span></text:p>
      <text:p text:style-name="P30"><text:span text:style-name="Emphasis">Xiān: No. No voy a perderte por esto.</text:span></text:p>
      <text:p text:style-name="P30"><text:span text:style-name="Emphasis">Aelinor: No me pierdes. Me entrego. Es diferente.</text:span></text:p>
      <text:p text:style-name="Text_20_body"><text:span text:style-name="Emphasis">Salió al muro. Y comenzó a pintar.</text:span></text:p>
      <text:p text:style-name="P19"><text:span text:style-name="Emphasis"><text:span text:style-name="T3">Capítulo XVI </text:span></text:span></text:p>
      <text:h text:style-name="P8" text:outline-level="2"><text:span text:style-name="Emphasis"><text:span text:style-name="T3">El Lienzo Primordial</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oft-page-break/><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Xiān se sentó en el centro del patio del Palacio. Frente a él, un lienzo en blanco de diez metros de alto. El lienzo más grande que jamás se había pintado. El Lienzo Primordial — el mismo que el Primer Pintor había usado para crear la luz.</text:span></text:p>
      <text:p text:style-name="Text_20_body"><text:span text:style-name="Emphasis">Comenzó a pintar. Cada trazo era un pedazo de su vida. Pintó el sol, y sintió cómo cinco años se evaporaban. Pintó el mar, y perdió diez más. Pintó las montañas, los ríos, los bosques. Con cada elemento del mundo, su cuerpo se deterioraba.</text:span></text:p>
      <text:p text:style-name="Text_20_body"><text:span text:style-name="Emphasis">En el muro, Aelinor luchaba. Su corazón de tinta latía tan fuerte que podía escucharse desde el patio. Cada latido era un pedazo de su vida consumido. Pero ella no se detenía. Pintaba guerreros de luz que saltaban del muro para enfrentar a los Espectros.</text:span></text:p>
      <text:p text:style-name="Text_20_body"><text:span text:style-name="Emphasis">Souma estaba a su lado, lanzando Tenkyūha tras Tenkyūha. Pero incluso un Gold Saint tiene límites. Estaba cubierto de sangre, su armadura astillada.</text:span></text:p>
      <text:p text:style-name="P30"><text:span text:style-name="Emphasis">Souma: ¡Xiān! ¡El lienzo! ¡Date prisa!</text:span></text:p>
      <text:p text:style-name="Text_20_body"><text:span text:style-name="Emphasis">Xiān no respondió. Estaba perdido en la pintura. Cada trazo era un mundo. Cada color era una emoción. Pintó a su madre, y sintió su calor por última vez. Pintó a su padre, y entendió su sacrificio. Pintó a Aelinor, y lloró.</text:span></text:p>
      <text:p text:style-name="Text_20_body"><text:span text:style-name="Emphasis">Pero el lienzo no estaba completo. Faltaba la pieza central: la Sombra misma. Para destruirla, tenía que pintarla. Y pintar la Sombra significaba abrirla.</text:span></text:p>
      <text:p text:style-name="P30"><text:span text:style-name="Emphasis">Xiān: ...perdóname, Aelinor.</text:span></text:p>
      <text:p text:style-name="Text_20_body"><text:span text:style-name="Emphasis">Y pintó la oscuridad.</text:span></text:p>
      <text:p text:style-name="P19"><text:span text:style-name="Emphasis"><text:span text:style-name="T3">Capítulo XVII </text:span></text:span></text:p>
      <text:h text:style-name="P8" text:outline-level="2"><text:span text:style-name="Emphasis"><text:span text:style-name="T3">La Batalla de Aelinor</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Yami rompió el muro. Aelinor lo esperaba delante de la brecha, con su capa carmesí convertida en alas de fuego y su corazón de tinta latiendo a un ritmo imposible.</text:span></text:p>
      <text:p text:style-name="P30"><text:span text:style-name="Emphasis">Yami: La noble pintora. Tu corazón está casi vacío. ¿Cuánto te queda? ¿Cinco latidos? ¿Tres?</text:span></text:p>
      <text:p text:style-name="P30"><text:span text:style-name="Emphasis">Aelinor: Los suficientes.</text:span></text:p>
      <text:p text:style-name="Text_20_body"><text:span text:style-name="Emphasis">Atacó. Aelinor pintó en el aire — líneas de luz que cortaban como cuchillas. Yami las absorbió con sus sombras, pero ella ya había pintado más. Cada ataque era un cuadro. Cada cuadro era un pedazo de su vida.</text:span></text:p>
      <text:p text:style-name="Text_20_body"><text:span text:style-name="Emphasis">La batalla fue hermosa y terrible. Dos fuerzas opuestas — luz y oscuridad, creación y destrucción — chocando en un espacio tan pequeño que el aire mismo se rompía.</text:span></text:p>
      <text:p text:style-name="Text_20_body"><text:span text:style-name="Emphasis">Yami lanzó su ataque final: una lanza de oscuridad pura que podría atravesar cualquier defensa. Aelinor no esquivó. No pintó un escudo. Simplemente se dejó atravesar.</text:span></text:p>
      <text:p text:style-name="Text_20_body"><text:span text:style-name="Emphasis">Pero en el momento en que la lanza la tocó, ella sonrió. Y su corazón de tinta latió por última vez.</text:span></text:p>
      <text:p text:style-name="Text_20_body"><text:span text:style-name="Emphasis">La explosión de luz destruyó a Yami. Destruyó a los Espectros cercanos. Destruyó medio muro. Y cuando la luz se disipó, Aelinor estaba en el suelo, inmóvil, con una sonrisa en los ojos.</text:span></text:p>
      <text:p text:style-name="P30"><text:span text:style-name="Emphasis">Souma: ¡Aelinor! ¡No!</text:span></text:p>
      <text:p text:style-name="Text_20_body"><text:span text:style-name="Emphasis">Xiān sintió la explosión desde el patio. Sintió cómo el corazón de Aelinor dejaba de latir. Y en el lienzo, la oscuridad que había comenzado a pintar cobró vida.</text:span></text:p>
      <text:p text:style-name="P19"><text:span text:style-name="Emphasis"><text:span text:style-name="T3">Capítulo XVIII </text:span></text:span></text:p>
      <text:h text:style-name="P8" text:outline-level="2"><text:span text:style-name="Emphasis"><text:span text:style-name="T3">El Último Trazo</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oft-page-break/><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Xiān estaba muriendo. Su cuerpo era el de un anciano de ochenta años. Su pelo era blanco. Sus manos no podían sostener el pincel. Pero seguía pintando.</text:span></text:p>
      <text:p text:style-name="Text_20_body"><text:span text:style-name="Emphasis">La Sombra estaba saliendo del lienzo. La oscuridad que había pintado se materializaba en el patio, extendiéndose como una mancha de aceite. Si terminaba de pintarla, la Sombra sería libre. Pero si no terminaba, el lienzo sería inútil.</text:span></text:p>
      <text:p text:style-name="P30"><text:span text:style-name="Emphasis">Xiān: ...Aelinor... necesito tu color...</text:span></text:p>
      <text:p text:style-name="Text_20_body"><text:span text:style-name="Emphasis">Souma corrió hacia él.</text:span></text:p>
      <text:p text:style-name="P30"><text:span text:style-name="Emphasis">Souma: ¡Xiān! ¡Detente! ¡Te vas a morir!</text:span></text:p>
      <text:p text:style-name="P30"><text:span text:style-name="Emphasis">Xiān: ...ya lo sé. Pero el lienzo... necesita el color de Aelinor. El color de su corazón. Sin él, la Sombra no puede ser sellada.</text:span></text:p>
      <text:p text:style-name="Text_20_body"><text:span text:style-name="Emphasis">Souma miró hacia donde yacía Aelinor. Y entonces lo entendió. El corazón de tinta de Aelinor — su chispa — no había desaparecido. Estaba en el aire, flotando, esperando.</text:span></text:p>
      <text:p text:style-name="Text_20_body"><text:span text:style-name="Emphasis">Souma la recogió. Era un punto de luz carmesí, cálido, latiendo. La llevó hasta Xiān.</text:span></text:p>
      <text:p text:style-name="P30"><text:span text:style-name="Emphasis">Souma: Aquí está. El color de Aelinor. El color de su sacrificio.</text:span></text:p>
      <text:p text:style-name="Text_20_body"><text:span text:style-name="Emphasis">Xiān tomó el punto de luz. Lo mezcló con su tinta. Y pintó el último trazo.</text:span></text:p>
      <text:p text:style-name="P19"><text:span text:style-name="Emphasis"><text:span text:style-name="T3">Capítulo XIX </text:span></text:span></text:p>
      <text:h text:style-name="P8" text:outline-level="2"><text:span text:style-name="Emphasis"><text:span text:style-name="T3">La Confrontación Final</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oft-page-break/><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El Lienzo Primordial se completó. Y cuando el último trazo tocó la superficie, el mundo cambió.</text:span></text:p>
      <text:p text:style-name="Text_20_body"><text:span text:style-name="Emphasis">La Sombra — la oscuridad original, la ausencia primordial — fue absorbida por el lienzo. Gritó. Un grito que no era sonido, que era la negación de todo sonido. Un grito que era el vacío intentando llenarse.</text:span></text:p>
      <text:p text:style-name="Text_20_body"><text:span text:style-name="Emphasis">Xiān sostuvo el lienzo. La Sombra luchaba dentro, intentando romper el marco, intentando escapar. Pero el lienzo era más fuerte. Estaba pintado con tres chispas: la de Xiān, la de su padre, y la de Aelinor.</text:span></text:p>
      <text:p text:style-name="P30"><text:span text:style-name="Emphasis">La Sombra: ...¿Por qué? ¿Por qué nos destruyes? Solo queríamos volver al vacío. Al principio. Antes del dolor.</text:span></text:p>
      <text:p text:style-name="P30"><text:span text:style-name="Emphasis">Xiān: Porque el vacío no es paz. Es nada. Y la vida... la vida con todo su dolor, su pérdida, su amor... vale más que la nada.</text:span></text:p>
      <text:p text:style-name="Text_20_body"><text:span text:style-name="Emphasis">El lienzo se cerró. La Sombra fue sellada. No como antes — no en un sello que podía romperse. Sino en un lienzo que era parte del mundo ahora. La oscuridad se convirtió en sombra. La sombra se convirtió en noche. Y la noche dejó de ser enemiga.</text:span></text:p>
      <text:p text:style-name="Text_20_body"><text:span text:style-name="Emphasis">Xiān cayó de rodillas. El lienzo se deslizó de sus manos. Y en el cielo, las nubes se abrieron. El sol brilló.</text:span></text:p>
      <text:p text:style-name="P19"><text:span text:style-name="Emphasis"><text:span text:style-name="T3">Capítulo XX </text:span></text:span></text:p>
      <text:h text:style-name="P8" text:outline-level="2"><text:span text:style-name="Emphasis"><text:span text:style-name="T3">El Amanecer Restaurado</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La guerra terminó. Los Espectros se disolvieron. El Palacio de Papier estaba en ruinas, pero de pie. Los sobrevivientes salieron de las criptas, de los refugios, de los lienzos donde se habían escondido.</text:span></text:p>
      <text:p text:style-name="Text_20_body"><text:span text:style-name="Emphasis">Souma encontró a Xiān en el patio, acostado sobre el Lienzo Primordial, incapaz de moverse. Su cuerpo era el de un anciano. Su pelo, blanco. Sus ojos, nublados. Pero estaba vivo.</text:span></text:p>
      <text:p text:style-name="P30"><text:span text:style-name="Emphasis">Souma: Lo lograste, Xiān. La Sombra está sellada. Para siempre.</text:span></text:p>
      <text:p text:style-name="P30"><text:span text:style-name="Emphasis">Xiān: ...Aelinor...</text:span></text:p>
      <text:p text:style-name="Text_20_body"><text:span text:style-name="Emphasis">Souma no respondió. No hacía falta.</text:span></text:p>
      <text:p text:style-name="Text_20_body"><text:span text:style-name="Emphasis">Xiān cerró los ojos. Y por primera vez en meses, soñó. Soñó con un jardín. Un jardín donde dos figuras caminaban de la mano, viejas, arrugadas, vivas. Una tenía la capa carmesí. La otra, manchas de tinta en las manos.</text:span></text:p>
      <text:p text:style-name="Text_20_body"><text:span text:style-name="Emphasis">En el sueño, Aelinor le sonreía.</text:span></text:p>
      <text:p text:style-name="P30"><text:span text:style-name="Emphasis">Aelinor: Te espero. Pero no todavía. Tienes que vivir.</text:span></text:p>
      <text:p text:style-name="Text_20_body"><text:span text:style-name="Emphasis">Xiān despertó. El sol brillaba. Y aunque su cuerpo estaba roto, su corazón latía.</text:span></text:p>
      <text:p text:style-name="Text_20_body"><text:span text:style-name="Emphasis">No había muerto. Había sobrevivido. Y eso, en sí mismo, era un milagro.</text:span></text:p>
      <text:p text:style-name="P19"><text:span text:style-name="Emphasis"><text:span text:style-name="T3">Capítulo XXI </text:span></text:span></text:p>
      <text:h text:style-name="P8" text:outline-level="2"><text:span text:style-name="Emphasis"><text:span text:style-name="T3">El Último Retrato</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oft-page-break/><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Un año después, Xiān vivía en una cabaña en el valle de Senda. No podía pintar — sus manos estaban demasiado dañadas, su cuerpo demasiado viejo. Pero podía enseñar. Había abierto una escuela para jóvenes pintores, para que aprendieran que el arte no era solo técnica, sino alma.</text:span></text:p>
      <text:p text:style-name="Text_20_body"><text:span text:style-name="Emphasis">Una tarde, una estudiante le trajo un lienzo en blanco.</text:span></text:p>
      <text:p text:style-name="P30"><text:span text:style-name="Emphasis">La estudiante: Maestro Xiān, quiere que pinte algo. Una última obra. Para la historia.</text:span></text:p>
      <text:p text:style-name="P30"><text:span text:style-name="Emphasis">Xiān: No puedo. Mis manos no responden.</text:span></text:p>
      <text:p text:style-name="P30"><text:span text:style-name="Emphasis">La estudiante: Entonces guíe la mía.</text:span></text:p>
      <text:p text:style-name="Text_20_body"><text:span text:style-name="Emphasis">Xiān miró a la joven. Y asintió.</text:span></text:p>
      <text:p text:style-name="Text_20_body"><text:span text:style-name="Emphasis">Guió las manos de la estudiante. Pincelada a pincelada, pintaron a Aelinor. No como había sido en la batalla — sino como Xiān la recordaba: sonriendo, con la capa carmesí ondeando, los ojos llenos de vida.</text:span></text:p>
      <text:p text:style-name="Text_20_body"><text:span text:style-name="Emphasis">Cuando terminaron, el retrato brilló. No con el brillo del Lost Canvas — con algo más suave. Con el brillo del amor.</text:span></text:p>
      <text:p text:style-name="Text_20_body"><text:span text:style-name="Emphasis">Xiān miró el retrato. Y por primera vez desde la batalla, lloró.</text:span></text:p>
      <text:p text:style-name="P30"><text:span text:style-name="Emphasis">Xiān: Gracias, Aelinor. Por todo.</text:span></text:p>
      <text:p text:style-name="P19"><text:span text:style-name="Emphasis"><text:span text:style-name="T3">Capítulo XXII </text:span></text:span></text:p>
      <text:h text:style-name="P8" text:outline-level="2"><text:span text:style-name="Emphasis"><text:span text:style-name="T3">Epílogo: El Lienzo Eterno</text:span></text:span></text:h>
      <text:p text:style-name="P13"><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text:span></text:p>
      <text:p text:style-name="P21"><text:span text:style-name="Emphasis">Xiān había crecido escuchando historias sobre su padre. Historias de un hombre que podía pintar la luz del sol y la oscuridad de la noche. Historias de un pintor que había salvado al mundo y había muerto en el intento. Pero también había historias más oscuras: historias de un hombre que había perdido la cordura, que había pintado cosas que no deberían existir, que había vendido su alma por poder. Xiān no sabía cuáles eran verdaderas. Pero sabía que tenía que descubrirlo por sí mism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Lost Canvas no era solo un poder. Era una maldición, un regalo, una responsabilidad. Era la capacidad de crear vida a costa de la propia. Y Xiān, hijo del Pintor Supremo, era el último en llevar esa carga. Pero no estaba solo. Aelinor estaba con él. Y Souma. Y todos los pintores del Palacio que habían decidido que valía la pena luchar.</text:span></text:p>
      <text:p text:style-name="P21"><text:span text:style-name="Emphasis">El sol se ponía sobre las montañas del norte, pintando el cielo de colores que ningún pintor podría replicar: dorados, carmesíes, púrpuras que se fundían con el azul profundo del crepúsculo. Xiān miró el horizonte y pensó que, por primera vez en su vida, la belleza del mundo era más fuerte que el miedo. El mundo valía la pena salvar. Y él valía la pena el esfuerz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Xiān recordaba las noches de su infancia, cuando su padre le enseñaba a pintar junto a la hoguera. Le decía que el pincel no era solo una herramienta, sino una extensión del alma. Que cada trazo debía venir del corazón, no de la mente. Y que el verdadero arte no era crear algo hermoso, sino crear algo verdadero.</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El Palacio de Papier era más grande de lo que Xiān había imaginado. Tenía setenta y siete escalones, cada uno con el nombre de un pintor famoso. Las paredes estaban cubiertas de frescos que representaban batallas contra la Sombra: pintores perdiendo la vida, lienzos que cobraban forma, ejércitos de tinta luchando contra ejércitos de oscuridad. Y en el centro del salón principal, había un trono vacío. El trono de Xiān. El trono de su padre. El trono del Pintor Supremo.</text:span></text:p>
      <text:p text:style-name="P21"><text:span text:style-name="Emphasis">Souma le enseñó la primera lección: el Lost Canvas no es técnica. Es entrega. Tu padre podía pintar un mundo en una hora porque entregaba todo su ser. No tenía miedo de morir. No tenía miedo de perder. Solo tenía miedo de no crear. Y eso era lo que lo hacía invencible.</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noche cayó sobre el Palacio como un manto de estrellas. Las antorchas ardían con llamas de tinta dorada, y las sombras danzaban sobre las paredes como pinturas vivientes. Xiān caminó por los pasillos vacíos, escuchando el eco de sus propios pasos. En algún lugar, Aelinor dormía. En algún lugar, Souma velaba por todos. Y en algún lugar, la Sombra esperaba su momento.</text:span></text:p>
      <text:p text:style-name="P21"><text:span text:style-name="Emphasis">El valle de Senda era hermoso en otoño. Los árboles se teñían de dorado y carmesí, y el viento llevaba el aroma de las hojas cayendo. Xiān solía sentarse en el puente de piedra y pintar el atardecer. No con el Lost Canvas, sino con tinta normal. Porque a veces, lo más hermoso no requiere poder. Solo requiere ojos que sepan ver.</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El entrenamiento fue brutal. Souma no tenía piedad. Pinta hasta que tus manos sangren, decía. Pinta hasta que ya no puedas sostener el pincel. Y entonces pinta más. Xiān pintó. Pintó hasta que sus dedos se agrietaron, hasta que sus ojos se nublaron, hasta que su cuerpo no respondió. Y entonces pintó más.</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El dolor era constante. No el dolor físico — ese se había convertido en parte de él. Era el dolor de saber que cada trazo lo acercaba al final. Que cada pintura consumía un pedazo de su existencia. Que algún día, el último trazo sería el último latido. Pero Xiān no se detenía. No podía detenerse. Porque si se detenía, todo habría sido en van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La relación entre Xiān y Aelinor había cambiado. Ya no eran solo compañeros de viaje. Eran algo más. Algo que no tenía nombre, pero que se sentía en cada mirada, en cada gesto, en cada silencio compartido. Era el tipo de conexión que solo existe entre personas que han enfrentado la muerte juntas y han decidido seguir viviend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 Cada latido era un recordatorio de que seguía vivo, de que seguía pintando, de que seguía pagando el precio. Pero también era un recordatorio de que tenía un propósito. Un destino. Una razón para seguir adelante, incluso cuando todo parecía perdido.</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Aelinor se despertó en la enfermería. La luz del amanecer entraba por la ventana, dorando todo con su calor. Miró a su alredvio y vio a Xiān dormido en una silla junto a su cama. Sonrió. Porque sabía que no estaba sola. Que nunca había estado sola. Que mientras Xiān estuviera ahí, ella tendría una razón para vivir.</text:span></text:p>
      <text:p text:style-name="P21"><text:span text:style-name="Emphasis">Souma era más que un mentor. Era un padre para Xiān. Le enseñó no solo a pintar, sino a vivir. Le enseñó que el poder no era un fin, sino un medio. Y que la verdadera fuerza no estaba en la capacidad de destruir, sino en la capacidad de proteger.</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Souma les dijo que el Lienzo Primordial era la única forma de destruir a la Sombra para siempre. Pero el precio era la vida del pintor. Xiān aceptó sin dudarlo. Aelinor protestó, pero era inútil. Xiān había tomado su decisión. Y cuando un pintor del Lost Canvas tomaba una decisión, no había vuelta atrás.</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tenía secretos que nadie conocía. Pasadizos ocultos, lienzos prohibidos, salas que solo los Gold Saints podían entrar. Y en lo más profundo del Palacio, en una cámara sellada con siete cerraduras de tinta, estaba el diario de Xi Dianxing. El diario que contaba la verdad sobre la Sombra. Y sobre el precio que había pagado por sellarla.</text:span></text:p>
      <text:p text:style-name="P21"><text:span text:style-name="Emphasis">El mundo del Lost Canvas no era como el mundo común. Aquí, las pinturas tenían alma. Los lienzos respiraban. Y cada trazo era un pacto entre el pintor y la eternidad. Xiān había aprendido esto de la manera más dolorosa: cada vez que daba vida a una obra, una parte de él se iba con ella. Pero también había aprendido algo más: que el arte era la única forma de trascender, de convertir lo efímero en eterno.</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Aelinor le mostró su secreto: el corazón de tinta. Un patrón de tinta negra que se extendía desde el hombro hasta el corazón, como raíces de un árbol maldito. Cada vez que usaba su Lost Canvas, el corazón de tinta consumía el suyo. Un latido a un latido. Y solo le quedaban tres latidos. Tres batallas más. Y entonces, moriría.</text:span></text:p>
      <text:p text:style-name="P21"><text:span text:style-name="Emphasis">El error de Xiān fue pintar un dragón. Un dragón de jade, el guardián supremo del Lost Canvas. Pero la Sombra contaminó el lienzo. Y el dragón se convirtió en un monstruo. Xiān casi murió. Fue Aelinor quien lo salvó. Y cuando Xiān despertó, había envejecido un año entero. El precio del dragón.</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Lienzo Primordial esperaba en el centro del patio. Era un lienzo en blanco de diez metros de alto, tan antiguo como el mundo mismo. Y cuando Xiān lo tocó, sintió el poder del Primer Pintor fluyendo por sus dedos. Era como si el lienzo lo conociera. Como si lo estuviera esperando.</text:span></text:p>
      <text:p text:style-name="P21"><text:span text:style-name="Emphasis">La Sombra no era solo oscuridad. Era memoria. La memoria de un mundo que existía antes de la luz. Un mundo donde no había dolor, no había muerte, no había pérdida. Y la Sombra quería volver a ese mundo. Quiere borrar la luz. Quiere borrar la vida. Quiere volver al vací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text:span></text:p>
      <text:p text:style-name="P21"><text:span text:style-name="Emphasis">Yami, el teniente de la Sombra, llegó al amanecer. Solo, sin armadura, con las manos vacías. La Sombra tiene una propuesta, dijo. Y Xiān tuvo que elegir: abrir la puerta del Abismo y liberar a la Sombra a cambio de que su madre viviera, o rechazar la oferta y seguir luchando. Xiān miró a Aelinor. Y dijo: N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asedio del Palacio fue la batalla más larga y sangrienta de la historia del Lost Canvas. Durante tres días y tres noches, los Espectros atacaron sin descanso. Los Gold Saints se turnaban para descansar, pero no había tiempo. Los estudiantes pintaban hasta que sus manos sangraban. Y Xiān... Xiān pintaba hasta que su cuerpo no respondía.</text:span></text:p>
      <text:p text:style-name="P21"><text:span text:style-name="Emphasis">La batalla final comenzó. Xiān pintó con una velocidad que no sabía que tenía. Cada trazo era una obra de arte. Cada trazo era un pedazo de su vida. Pintó el sol, la luna, las estrellas. Pintó el mar, los ríos, las montañas. Pintó todo el mundo en un solo lienzo. Y cuando terminó, el mundo brilló con una luz que la Sombra no pudo soportar.</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El amor entre Xiān y Aelinor era imposible. Él era el Pintor Perdido, destinado a morir pintando el Lienzo Primordial. Ella era la guerrera con un corazón de destinada a latir solo tres veces más. Y sin embargo, se amaban. Se amaban con la intensidad de quienes saben que su tiempo es limitado. Se amaban como si cada momento fuera el último.</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Cuando Yami rompió el muro, la oscuridad entró como una inundación. Los Espectros se extendieron por el patio como una marea negra. Souma lanzó su Tenkyūha, pero era como intentar vaciar el océano con un cubo. Aelinor pintó un dragón de fuego, pero la oscuridad lo consumió. Y Xiān... Xiān comenzó a pintar el Lienzo Primordial.</text:span></text:p>
      <text:p text:style-name="P21"><text:span text:style-name="Emphasis">El Lienzo Primordial era el lienzo más antiguo del mundo. El que el Primer Pintor había usado para crear la luz. Y ahora, Xiān tenía que pintar sobre él. Cada trazo era un pedazo de su vida. Pintó el sol, y sintió cómo cinco años se evaporaban. Pintó el mar, y perdió diez más. Pintó las montañas, los ríos, los bosques. Con cada elemento del mundo, su cuerpo se deteriorab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Aelinor le contó su historia mientras caminaban. Le contó sobre su padre, un pintor noble que había sido asesinado por la Sombra cuando ella tenía doce años. Le contó sobre el corazón de tinta que se había pintado para vengarlo. Le contó sobre los tres latidos que le quedaban. Y Xiān, por primera vez, entendió que no era el único que sufría. No era el único que pagaba el preci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oft-page-break/><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Aelinor enfrentó a Yami sola. Su corazón de tinta latía tan fuerte que podía escucharse desde el patio. Cada latido era un pedazo de su vida consumido. Pero ella no se detenía. Pintaba guerreros de luz, uno tras otro. Cada guerrero chocaba contra Yami y se deshacía. Pero Aelinor seguía pintando. Porque tenía que darle tiempo a Xiā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 En coraje.</text:span></text:p>
      <text:p text:style-name="P21"><text:span text:style-name="Emphasis">El Lienzo Primordial brilló con una luz que no era de este mundo. Y cuando Xiān lo tocó, sintió el poder del Primer Pintor fluyendo por sus venas. Era como si todos los pintores que habían existido antes que él estuvieran ahí, apoyándolo, dándole fuerza, dándole esperanza.</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Han pasado cincuenta años. Xiān murió en paz, en su cabaña de Senda, rodeado de sus estudiantes. El Lienzo Primordial está en el museo del Palacio de Papier. Los visitantes lo miran y no ven nada. Solo un lienzo en blanco. Pero los que tienen el don del Lost Canvas ven la verdad: tres chispas de luz, entrelazadas, brillando para siempre.</text:span></text:p>
      <text:p text:style-name="P21"><text:span text:style-name="Emphasis">La Sombra gritó cuando el lienzo se cerró. Un grito que resonó en todo el mundo, que hizo temblar las montañas, que rompió el cielo. Y entonces, el silencio. Un silencio absoluto. Porque la Sombra había sido sellada. Para siempre.</text:span></text:p>
      <text:p text:style-name="P21"><text:span text:style-name="Emphasis">Xiān cayó de rodillas. Su cuerpo estaba roto. Su alma estaba rota. Pero estaba vivo. Y el mundo estaba a salvo. Y eso era suficien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Cuando el corazón de tinta latió por última vez, Aelinor sonrió. Y la explosión de luz destruyó a Yami. Destruyó a los Espectros cercanos. Destruyó medio muro. Y cuando la luz se disipó, Aelinor estaba en el suelo, inmóvil, con una sonrisa en los ojos. Pero no estaba muerta. No todavía.</text:span></text:p>
      <text:p text:style-name="P21"><text:span text:style-name="Emphasis">Xiān cayó de rodillas. Su cuerpo estaba roto. Su alma estaba rota. Pero estaba vivo. Y el mundo estaba a salvo. Y eso era suficiente.</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observaba desde lejos, su armadura de Libra brillando con una luz que no era natural. Había visto a muchos pintores llegar al Palacio. Había visto a muchos morir. Pero Xiān era diferente. Xiān tenía algo que los demás no tenían: la capacidad de pintar sin miedo. O quizás con tanto miedo que se había convertido en algo más.</text:span></text:p>
      <text:p text:style-name="P21"><text:span text:style-name="Emphasis">El Palacio de Papier se extendía ante ellos como un sueño hecho de papel y tinta. Sus torres se alzaban hacia un cielo que parecía pintado, y cada ventana reflejaba una versión diferente del mundo, como si el Palacio mismo fuera un lienzo que se reescribía constantemente. Era hermoso. Era terrible. Era el último bastión de la humanidad contra la oscuridad.</text:span></text:p>
      <text:p text:style-name="P21"><text:span text:style-name="Emphasis">Aelinor corrió hacia él. Lo abrazó. Y lloró. No de tristeza. De alegría. Porque Xiān había sobrevivido. Porque la batalla había terminado. Porque el mundo estaba a salvo.</text:span></text:p>
      <text:p text:style-name="P21"><text:span text:style-name="Emphasis">Souma se acercó y puso una mano en el hombro de Xiān. Lo lograste, dijo. Tu padre estaría orgulloso. Y Xiān sonrió. Porque sabía que era verdad.</text:span></text:p>
      <text:p text:style-name="P21"><text:span text:style-name="Emphasis">Xiān sintió la explosión desde el patio. Sintió cómo el corazón de Aelinor dejaba de latir. Y en el lienzo, la oscuridad que había comenzado a pintar cobró vida. La Sombra estaba saliendo. Y si no terminaba el lienzo, todo habría sido en vano.</text:span></text:p>
      <text:p text:style-name="P21"><text:span text:style-name="Emphasis">La batalla fue feroz pero breve. Xiān pintó un guerrero de luz que saltó del lienzo con una espada flamígera. El Espectro intentó esquivar, pero era demasiado lento. El guerrero lo atravesó. El Espectro gritó y se deshizo en humo negro. Pero Xiān cayó de rodillas. Su mano temblaba. Y había sangre en sus palmas. El precio del Lost Canvas.</text:span></text:p>
      <text:p text:style-name="P21"><text:span text:style-name="Emphasis">Souma se acercó y puso una mano en el hombro de Xiān. Lo lograste, dijo. Tu padre estaría orgulloso. Y Xiān sonrió. Porque sabía que era verdad.</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text:span></text:p>
      <text:p text:style-name="P21"><text:span text:style-name="Emphasis">Souma le trajo el color de Aelinor: un punto de luz carmesí, cálido, latiendo. Era el último latido del corazón de tinta. La chispa de Aelinor. Y Xiān lo mezcló con su tinta. Y pintó el último trazo.</text:span></text:p>
      <text:p text:style-name="P21"><text:span text:style-name="Emphasis">El Palacio de Papier fue reconstruido. Los estudiantes volvieron a pintar. Y Xiān... Xiān enseñó a una nueva generación de pintores del Lost Canvas. Les enseñó que el poder no era un arma, sino un regalo. Y que el verdadero arte era crear algo que valiera la pena morir.</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text:span></text:p>
      <text:p text:style-name="P21"><text:span text:style-name="Emphasis">En la distancia, las montañas del norte se alzaban como guardianes silenciosos. Sus cimas nevadas brillaban bajo una luna que parecía demasiado grande, demasiado cerca, como si el universo mismo estuviera observando, esperando el siguiente trazo del pintor. Xiān miró las montañas y supo que al otro lado estaba el Abismo. Y que tendría que enfrentarlo.</text:span></text:p>
      <text:p text:style-name="P21"><text:span text:style-name="Emphasis">Los años pasaron. Xiān envejeció. Sus manos se arrugaron. Su pelo se volvió blanco. Pero sus ojos seguían brillando con la misma luz que siempre había tenido. La luz de un pintor. La luz de un héroe. La luz de un hombre que había salvado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El Lienzo Primordial se completó. Y cuando el último trazo tocó la superficie, el mundo cambió. La Sombra fue absorbida por el lienzo. Gritó. Un grito que no era sonido, que era la negación de todo sonido. Y Xiān le respondió: Porque el vacío no es paz. Es nada. Y la vida vale más que la nada.</text:span></text:p>
      <text:p text:style-name="P21"><text:span text:style-name="Emphasis">El aire mismo parecía vibrar con energía, como si el mundo contuviera la respiración. Cada átomo, cada partícula, cada fragmento de existencia parecía esperar el siguiente movimiento del pintor. Xiān sentía el peso de esa expectativa. El peso de ser el último. El peso de ser el único que podía salvar al mundo.</text:span></text:p>
      <text:p text:style-name="P21"><text:span text:style-name="Emphasis">El mundo había cambiado desde que Xiān llegó al Palacio. Los pasillos que antes estaban llenos de risas y conversaciones ahora estaban llenos de silencio y preparación. Los estudiantes pintaban con una urgencia que no habían sentido nunca. Sabían que la batalla final se acercaba. Y sabían que no todos sobrevivirían.</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guerra terminó. Los Espectros se disolvieron. El Palacio de Papier estaba en ruinas, pero de pie. Souma encontró a Xiān en el patio, acostado sobre el Lienzo Primordial, incapaz de moverse. Su cuerpo era el de un anciano. Pero estaba vivo.</text:span></text:p>
      <text:p text:style-name="P21"><text:span text:style-name="Emphasis">Xiān se sentó en el borde de la cama y miró sus manos. Estaban cubiertas de manchas de tinta que nunca se quitaban, cicatrices de batallas pasadas, marcas de un pintor del Lost Canvas. Eran las manos de un guerrero. Las manos de un artista. Las manos de un hombre que había dado todo por los demás.</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 Algunos lo envidiaban. Otros lo compadecían. Pero todos lo respetaban.</text:span></text:p>
      <text:p text:style-name="P21"><text:span text:style-name="Emphasis">La noche era fría y estrellada. Xiān salió al jardín del Palacio y miró las estrellas. Cada estrella era un mundo, un universo infinito de posibilidades. Y en algún lugar, en el centro de la oscuridad, la Sombra esperaba. Esperando el momento perfecto. Esperando la oportunidad de borrar la luz del mundo.</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Un año después, Xiān vivía en una cabaña en el valle de Senda. No podía pintar. Sus manos estaban demasiado dañadas. Pero podía enseñar. Había abierto una escuela para jóvenes pintores. Y una tarde, una estudiante le trajo un lienzo en blanco. Maestro Xiān, quiere que pinte algo. Una última obra. Para la historia.</text:span></text:p>
      <text:p text:style-name="P21"><text:span text:style-name="Emphasis">La tinta en las manos de Xiān no era solo pigmento. Era vida. Era sangre. Era el precio que tendría que pagar por cada creación. Y cada trazo lo acercaba más al final, más al momento en que el Canvas consumiría todo lo que quedaba de él. Pero Xiān no se detenía. No podía detenerse. Porque si se detenía, el mundo moriría.</text:span></text:p>
      <text:p text:style-name="P21"><text:span text:style-name="Emphasis">Aelinor se acercó por detrás. No dijo nada. Solo se sentó junto a él y apoyó la cabeza en su hombro. Y en ese momento, el mundo pareció detenerse. No había Sombra. No había batalla. No había Lost Canvas. Solo ellos dos, bajo las estrellas, compartiendo un momento de paz en medio de la torment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El Lost Canvas no era solo un poder. Era una maldición, un regalo, una responsabilidad. Era la capacidad de crear vida a costa de la propia. Y Xiān, hijo del Pintor Supremo, era el último en llevar esa carga.</text:span></text:p>
      <text:p text:style-name="P21"><text:span text:style-name="Emphasis">Los otros pintores del Palacio observaban a Xiān con una mezcla de admiración y temor. Sabían quién era. Sabían lo que representaba. Y sabían que su llegada significaba que la Sombra estaba cerca, que la batalla final se acercaba.</text:span></text:p>
      <text:p text:style-name="P21"><text:span text:style-name="Emphasis">Souma les dijo que el consejo había tomado una decisión. Xiān sería el líder de la defensa. Aelinor sería su segunda. Y los demás pintores seguirían sus órdenes. Era una responsabilidad enorme. Un peso que Xiān no quería cargar. Pero no tenía elección. Era el Pintor Perdido. El último. El único que podía salvar al mundo.</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El aire mismo parecía vibrar con energía, como si el mundo contuviera la respiración. Cada átomo, cada partícula, cada fragmento de existencia parecía esperar el siguiente movimiento del pintor.</text:span></text:p>
      <text:p text:style-name="P21"><text:span text:style-name="Emphasis">El silencio que siguió era el tipo de silencio que precede a los terremotos y a las revelaciones. Xiān podía escuchar su propio corazón latiendo, cada latido un recordatorio de que seguía vivo, de que seguía pintando, de que seguía pagando el precio del Canvas Perdido. La tinta en sus manos no era solo pigmento. Era vida. Era sangre. Era el precio que tendría que pagar por cada creación.</text:span></text:p>
      <text:p text:style-name="P21"><text:span text:style-name="Emphasis">La Sombra atacó al amanecer. No con un ejército. Con una sola figura. Una figura que caminaba sola hacia el Palacio, sin armadura, sin armas, sin miedo. Era Yami. Y detrás de él, la oscuridad se extendía como un océano de sombras.</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Aelinor se mantuvo a su lado, silenciosa pero presente. Su capa carmesí ondeaba sin viento, como si el propio aire la respetara. En sus ojos había algo que Xiān no había visto antes: no era miedo, no era rabia. Era determinación. La determinación de quien ha decidido que vale la pena morir por algo.</text:span></text:p>
      <text:p text:style-name="P21"><text:span text:style-name="Emphasis">Xiān cerró los ojos y dejó que el silencio lo envolviera. En esos momentos de quietud, podía sentir el latido del Canvas Perdido, ese poder antiguo que fluía por sus venas como tinta líquida, esperando ser liberado.</text:span></text:p>
      <text:p text:style-name="P21"><text:span text:style-name="Emphasis">La batalla fue épica. Xiān pintó guerreros de luz que llenaron el cielo. Aelinor pintó dragones de fuego que iluminaron la oscuridad. Souma lanzó su Tenkyūha con una fuerza que hizo temblar la tierra. Pero la Sombra era más fuerte. Mucho más fuerte.</text:span></text:p>
      <text:p text:style-name="P21"><text:span text:style-name="Emphasis">Cuando todo parecía perdido, Xiān tomó una decisión. Pintaría el Lienzo Primordial. No importaba el precio. No importaba si moría. Porque si no lo hacía, todos morirían. Y eso era inaceptable.</text:span></text:p>
      <text:p text:style-name="Text_20_body"><text:span text:style-name="Emphasis">Han pasado cincuenta años. Xiān murió en paz, en su cabaña de Senda, rodeado de sus estudiantes. Tenía el cuerpo de un anciano, pero el alma de un joven. Y cuando cerró los ojos por última vez, dicen que sonrió.</text:span></text:p>
      <text:p text:style-name="Text_20_body"><text:span text:style-name="Emphasis">El Lienzo Primordial está en el museo del Palacio de Papier. Los visitantes lo miran y no ven nada — solo un lienzo en blanco. Pero los que tienen el don del Lost Canvas ven la verdad: tres chispas de luz, entrelazadas, brillando para siempre. La de Xiān, la de su padre, y la de Aelinor.</text:span></text:p>
      <text:p text:style-name="Text_20_body"><text:span text:style-name="Emphasis">En el jardín del Palacio, hay dos estatuas. La de un joven con manchas de tinta en las manos. La de una joven con una capa carmesí. Están una al lado de la otra, mirando el horizonte.</text:span></text:p>
      <text:p text:style-name="Text_20_body"><text:span text:style-name="Emphasis">Y cada año, en el aniversario de la batalla, los pintores del Palacio se reúnen frente a las estatuas. Recitan las palabras de Xiān, la última frase que pronunció antes de morir:</text:span></text:p>
      <text:p text:style-name="Cuerpo_20_de_20_texto.prophecy"><text:span text:style-name="Emphasis">«El Lost Canvas no es una maldición.<text:line-break/>Es la prueba de que el amor existe.<text:line-break/>Porque solo el amor<text:line-break/>puede pintar algo que cuesta la vida<text:line-break/>y aún así, valer la pena.»</text:span></text:p>
      <text:p text:style-name="Text_20_body"><text:span text:style-name="Emphasis">Y el viento sopla. Y las flores de tinta del jardín florecen. Y en algún lugar, entre el lienzo y el alma, Xiān y Aelinor caminan juntos, viejos, felices, etern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s" fo:country="E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5%"/>
      <style:text-properties style:font-name="Georgia" fo:font-family="Georgia, Palatino, serif" fo:font-size="9pt" style:font-name-asian="Georgia" style:font-family-asian="Georgia, Palatino, serif" style:font-size-asian="9pt" style:font-name-complex="Georgia" style:font-family-complex="Georgia, Palatino, serif" style:font-size-complex="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uerpo_20_de_20_texto.dialogue" style:display-name="Cuerpo de texto.dialogue" style:family="paragraph" style:parent-style-name="Text_20_body">
      <style:paragraph-properties fo:margin-left="0.212cm" fo:margin-right="0.212cm" fo:margin-top="0.212cm" fo:margin-bottom="0.212cm" style:contextual-spacing="false" fo:padding-left="0.049cm" fo:padding-right="0cm" fo:padding-top="0cm" fo:padding-bottom="0cm" fo:border-left="2.24pt solid #ffd700" fo:border-right="none" fo:border-top="none" fo:border-bottom="none"/>
      <style:text-properties fo:font-style="italic" style:font-style-asian="italic" style:font-style-complex="italic"/>
    </style:style>
    <style:style style:name="Cuerpo_20_de_20_texto.prophecy" style:display-name="Cuerpo de texto.prophecy" style:family="paragraph" style:parent-style-name="Text_20_body">
      <style:paragraph-properties fo:margin-left="0.397cm" fo:margin-right="0.397cm" fo:margin-top="0.397cm" fo:margin-bottom="0.397cm" style:contextual-spacing="false" fo:text-align="center" style:justify-single-word="false" fo:padding-left="0cm" fo:padding-right="0cm" fo:padding-top="0.318cm" fo:padding-bottom="0.318cm" fo:border-left="none" fo:border-right="none" fo:border-top="0.06pt solid #ffd700" fo:border-bottom="0.06pt solid #ffd700"/>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799cm" fo:margin-left="1.401cm" fo:margin-right="1.40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l Lost Canvas — Edicion Completa</dc:title>
    <meta:document-statistic meta:table-count="0" meta:image-count="0" meta:object-count="0" meta:page-count="29" meta:paragraph-count="6480" meta:word-count="300455" meta:character-count="1692858" meta:non-whitespace-character-count="1398749"/>
    <meta:generator>LibreOffice/24.2.7.2$Linux_X86_64 LibreOffice_project/420$Build-2</meta:generator>
    <meta:user-defined meta:name=""/>
  </office:meta>
</office:document-meta>
</file>